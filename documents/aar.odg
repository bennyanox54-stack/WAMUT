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400000300C44F8E6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Black" svg:font-family="'Arial Black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823b0b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823b0b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Times New Roman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3" style:family="text">
      <style:text-properties fo:color="#000000" loext:opacity="100%" style:font-name="Times New Roman" fo:font-size="11.1000003814697pt" fo:font-weight="bold" style:font-name-asian="Times New Roman" style:font-size-asian="11.1000003814697pt" style:font-weight-asian="bold" style:font-name-complex="Times New Roman" style:font-size-complex="11.1000003814697pt" style:font-weight-complex="bold"/>
    </style:style>
    <style:style style:name="T4" style:family="text">
      <style:text-properties fo:color="#000000" loext:opacity="100%" style:font-name="Arial Black" fo:font-size="9.89999961853027pt" fo:font-weight="900" style:font-name-asian="Arial Black" style:font-size-asian="9.89999961853027pt" style:font-weight-asian="900" style:font-name-complex="Arial Black" style:font-size-complex="9.89999961853027pt" style:font-weight-complex="900"/>
    </style:style>
    <style:style style:name="T5" style:family="text">
      <style:text-properties fo:color="#000000" loext:opacity="100%" style:font-name="Times New Roman" fo:font-size="9.89999961853027pt" fo:font-weight="bold" style:font-name-asian="Times New Roman" style:font-size-asian="9.89999961853027pt" style:font-weight-asian="bold" style:font-name-complex="Times New Roman" style:font-size-complex="9.89999961853027pt" style:font-weight-complex="bold"/>
    </style:style>
    <style:style style:name="T6" style:family="text">
      <style:text-properties fo:color="#000000" loext:opacity="100%" style:font-name="Times New Roman" fo:font-size="9.89999961853027pt" fo:font-weight="normal" style:font-name-asian="Times New Roman" style:font-size-asian="9.89999961853027pt" style:font-weight-asian="normal" style:font-name-complex="Times New Roman" style:font-size-complex="9.89999961853027pt" style:font-weight-complex="normal"/>
    </style:style>
    <style:style style:name="T7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fo:color="#000000" loext:opacity="100%" style:font-name="TimesNewRoman" fo:font-size="9.89999961853027pt" fo:font-weight="bold" style:font-name-asian="TimesNewRoman" style:font-size-asian="9.89999961853027pt" style:font-weight-asian="bold" style:font-name-complex="TimesNewRoman" style:font-size-complex="9.89999961853027pt" style:font-weight-complex="bold"/>
    </style:style>
    <style:style style:name="T9" style:family="text">
      <style:text-properties fo:color="#000000" loext:opacity="100%" style:font-name="TimesNewRoman" fo:font-size="9.89999961853027pt" fo:font-weight="normal" style:font-name-asian="TimesNewRoman" style:font-size-asian="9.89999961853027pt" style:font-weight-asian="normal" style:font-name-complex="TimesNewRoman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8cm" svg:x="2.541cm" svg:y="1.26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614cm" svg:height="0.105cm" svg:x="2.49cm" svg:y="25.344cm" svg:viewBox="0 0 16615 106" draw:points="0,0 16615,0 16615,106 0,106">
          <text:p/>
        </draw:polygon>
        <draw:polygon draw:style-name="gr2" draw:text-style-name="P3" draw:layer="layout" svg:width="16.614cm" svg:height="0.025cm" svg:x="2.49cm" svg:y="25.475cm" svg:viewBox="0 0 16615 26" draw:points="0,0 16615,0 16615,26 0,26">
          <text:p/>
        </draw:polygon>
        <draw:frame draw:style-name="gr3" draw:text-style-name="P4" draw:layer="layout" svg:width="5.178cm" svg:height="0.705cm" svg:x="8.519cm" svg:y="25.548cm">
          <draw:text-box>
            <text:p text:style-name="P1"><text:span text:style-name="T2">wamut is ISO 9001:2015 </text:span><text:span text:style-name="T2">Certified </text:span></text:p>
            <text:p text:style-name="P1"><text:span text:style-name="T2">Empowering society through </text:span><text:span text:style-name="T2">technology</text:span></text:p>
          </draw:text-box>
        </draw:frame>
        <draw:frame draw:style-name="gr1" draw:text-style-name="P2" draw:layer="layout" svg:width="0.388cm" svg:height="0.48cm" svg:x="12.893cm" svg:y="25.8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2.622cm" svg:y="3.43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9.212cm" svg:height="0.48cm" svg:x="6.139cm" svg:y="3.795cm">
          <draw:text-box>
            <text:p text:style-name="P1"><text:span text:style-name="T4">W</text:span><text:span text:style-name="T4">A</text:span><text:span text:style-name="T4">N</text:span><text:span text:style-name="T4">G</text:span><text:span text:style-name="T4">A</text:span><text:span text:style-name="T4">R</text:span><text:span text:style-name="T4">I</text:span><text:span text:style-name="T4"> </text:span><text:span text:style-name="T4">M</text:span><text:span text:style-name="T4">A</text:span><text:span text:style-name="T4">A</text:span><text:span text:style-name="T4">T</text:span><text:span text:style-name="T4">H</text:span><text:span text:style-name="T4">A</text:span><text:span text:style-name="T4">I</text:span><text:span text:style-name="T4"> </text:span><text:span text:style-name="T4">U</text:span><text:span text:style-name="T4">N</text:span><text:span text:style-name="T4">I</text:span><text:span text:style-name="T4">V</text:span><text:span text:style-name="T4">E</text:span><text:span text:style-name="T4">R</text:span><text:span text:style-name="T4">S</text:span><text:span text:style-name="T4">I</text:span><text:span text:style-name="T4">T</text:span><text:span text:style-name="T4">Y</text:span><text:span text:style-name="T4"> </text:span><text:span text:style-name="T4"><text:s/></text:span><text:span text:style-name="T4">O</text:span><text:span text:style-name="T4">F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text:span text:style-name="T4"> </text:span></text:p>
          </draw:text-box>
        </draw:frame>
        <draw:frame draw:style-name="gr4" draw:text-style-name="P5" draw:layer="layout" svg:width="5.249cm" svg:height="0.48cm" svg:x="8.011cm" svg:y="4.29cm">
          <draw:text-box>
            <text:p text:style-name="P1"><text:span text:style-name="T4">P.</text:span><text:span text:style-name="T4">O</text:span><text:span text:style-name="T4">. </text:span><text:span text:style-name="T4">B</text:span><text:span text:style-name="T4">O</text:span><text:span text:style-name="T4">X </text:span><text:span text:style-name="T4">6</text:span><text:span text:style-name="T4">5</text:span><text:span text:style-name="T4">7 </text:span><text:span text:style-name="T4">- </text:span><text:span text:style-name="T4">1</text:span><text:span text:style-name="T4">0</text:span><text:span text:style-name="T4">1</text:span><text:span text:style-name="T4">0</text:span><text:span text:style-name="T4">0, </text:span><text:span text:style-name="T4">N</text:span><text:span text:style-name="T4">ai</text:span><text:span text:style-name="T4">r</text:span><text:span text:style-name="T4">o</text:span><text:span text:style-name="T4">bi </text:span></text:p>
          </draw:text-box>
        </draw:frame>
        <draw:frame draw:style-name="gr4" draw:text-style-name="P5" draw:layer="layout" svg:width="6.193cm" svg:height="0.48cm" svg:x="7.279cm" svg:y="4.79cm">
          <draw:text-box>
            <text:p text:style-name="P1"><text:span text:style-name="T4">T</text:span><text:span text:style-name="T4">E</text:span><text:span text:style-name="T4">L</text:span><text:span text:style-name="T4">E</text:span><text:span text:style-name="T4">P</text:span><text:span text:style-name="T4">H</text:span><text:span text:style-name="T4">O</text:span><text:span text:style-name="T4">N</text:span><text:span text:style-name="T4">E</text:span><text:span text:style-name="T4">:</text:span><text:span text:style-name="T4"> </text:span><text:span text:style-name="T4">0</text:span><text:span text:style-name="T4">7</text:span><text:span text:style-name="T4">0</text:span><text:span text:style-name="T4">9</text:span><text:span text:style-name="T4">2</text:span><text:span text:style-name="T4">0</text:span><text:span text:style-name="T4">2</text:span><text:span text:style-name="T4">9</text:span><text:span text:style-name="T4">1</text:span><text:span text:style-name="T4">4</text:span><text:span text:style-name="T4">,</text:span><text:span text:style-name="T4"> </text:span><text:span text:style-name="T4">E</text:span><text:span text:style-name="T4">x</text:span><text:span text:style-name="T4">t</text:span><text:span text:style-name="T4">.</text:span><text:span text:style-name="T4"> </text:span><text:span text:style-name="T4">1</text:span><text:span text:style-name="T4">0</text:span><text:span text:style-name="T4">3</text:span><text:span text:style-name="T4">2</text:span><text:span text:style-name="T4"> </text:span></text:p>
          </draw:text-box>
        </draw:frame>
        <draw:frame draw:style-name="gr4" draw:text-style-name="P5" draw:layer="layout" svg:width="11.337cm" svg:height="0.48cm" svg:x="5.284cm" svg:y="5.285cm">
          <draw:text-box>
            <text:p text:style-name="P1"><text:span text:style-name="T4">E-mail: </text:span><text:span text:style-name="T4">registra</text:span><text:span text:style-name="T4">raa@wa</text:span><text:span text:style-name="T4">mut.ac.</text:span><text:span text:style-name="T4">ke; </text:span><text:span text:style-name="T4">website: </text:span><text:span text:style-name="T4">www.w</text:span><text:span text:style-name="T4">amut.ac</text:span><text:span text:style-name="T4">.ke </text:span></text:p>
          </draw:text-box>
        </draw:frame>
        <draw:frame draw:style-name="gr4" draw:text-style-name="P5" draw:layer="layout" svg:width="9.532cm" svg:height="0.48cm" svg:x="5.686cm" svg:y="5.785cm">
          <draw:text-box>
            <text:p text:style-name="P1"><text:span text:style-name="T4">Office of the </text:span><text:span text:style-name="T4">Registrar, </text:span><text:span text:style-name="T4">Academic </text:span><text:span text:style-name="T4">Affairs &amp; </text:span><text:span text:style-name="T4">Research </text:span></text:p>
          </draw:text-box>
        </draw:frame>
        <draw:frame draw:style-name="gr4" draw:text-style-name="P5" draw:layer="layout" svg:width="13.277cm" svg:height="0.39cm" svg:x="4.171cm" svg:y="6.287cm">
          <draw:text-box>
            <text:p text:style-name="P1"><text:span text:style-name="T5">R</text:span><text:span text:style-name="T5">E</text:span><text:span text:style-name="T5">G</text:span><text:span text:style-name="T5">I</text:span><text:span text:style-name="T5">S</text:span><text:span text:style-name="T5">T</text:span><text:span text:style-name="T5">R</text:span><text:span text:style-name="T5">A</text:span><text:span text:style-name="T5">T</text:span><text:span text:style-name="T5">I</text:span><text:span text:style-name="T5">O</text:span><text:span text:style-name="T5">N </text:span><text:span text:style-name="T5">C</text:span><text:span text:style-name="T5">H</text:span><text:span text:style-name="T5">E</text:span><text:span text:style-name="T5">C</text:span><text:span text:style-name="T5">K</text:span><text:span text:style-name="T5">L</text:span><text:span text:style-name="T5">I</text:span><text:span text:style-name="T5">S</text:span><text:span text:style-name="T5">T </text:span><text:span text:style-name="T5">F</text:span><text:span text:style-name="T5">O</text:span><text:span text:style-name="T5">R </text:span><text:span text:style-name="T5">N</text:span><text:span text:style-name="T5">E</text:span><text:span text:style-name="T5">W</text:span><text:span text:style-name="T5">L</text:span><text:span text:style-name="T5">Y </text:span><text:span text:style-name="T5">A</text:span><text:span text:style-name="T5">D</text:span><text:span text:style-name="T5">M</text:span><text:span text:style-name="T5">I</text:span><text:span text:style-name="T5">T</text:span><text:span text:style-name="T5">T</text:span><text:span text:style-name="T5">E</text:span><text:span text:style-name="T5">D </text:span><text:span text:style-name="T5">S</text:span><text:span text:style-name="T5">T</text:span><text:span text:style-name="T5">U</text:span><text:span text:style-name="T5">D</text:span><text:span text:style-name="T5">E</text:span><text:span text:style-name="T5">N</text:span><text:span text:style-name="T5">T</text:span><text:span text:style-name="T5">S </text:span><text:span text:style-name="T5">(</text:span><text:span text:style-name="T5">P</text:span><text:span text:style-name="T5">a</text:span><text:span text:style-name="T5">g</text:span><text:span text:style-name="T5">e</text:span><text:span text:style-name="T5">: </text:span><text:span text:style-name="T5">1 </text:span><text:span text:style-name="T5">o</text:span><text:span text:style-name="T5">f </text:span><text:span text:style-name="T5">1</text:span><text:span text:style-name="T5">) </text:span></text:p>
          </draw:text-box>
        </draw:frame>
        <draw:frame draw:style-name="gr4" draw:text-style-name="P5" draw:layer="layout" svg:width="7.489cm" svg:height="0.39cm" svg:x="6.994cm" svg:y="6.901cm">
          <draw:text-box>
            <text:p text:style-name="P1"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</text:span><text:span text:style-name="T6">t</text:span><text:span text:style-name="T6"> </text:span><text:span text:style-name="T6">N</text:span><text:span text:style-name="T6">o</text:span><text:span text:style-name="T6">:</text:span><text:span text:style-name="T6"> <text:s/></text:span><text:span text:style-name="T6">w</text:span><text:span text:style-name="T6">a</text:span><text:span text:style-name="T6">m</text:span><text:span text:style-name="T6">u</text:span><text:span text:style-name="T6">t</text:span><text:span text:style-name="T6">/</text:span><text:span text:style-name="T6">A</text:span><text:span text:style-name="T6">A</text:span><text:span text:style-name="T6">R</text:span><text:span text:style-name="T6">/</text:span><text:span text:style-name="T6">A</text:span><text:span text:style-name="T6">P</text:span><text:span text:style-name="T6">K</text:span><text:span text:style-name="T6">&amp;</text:span><text:span text:style-name="T6">A</text:span><text:span text:style-name="T6">P</text:span><text:span text:style-name="T6">S</text:span><text:span text:style-name="T6">/</text:span><text:span text:style-name="T6">F</text:span><text:span text:style-name="T6">O</text:span><text:span text:style-name="T6">R</text:span><text:span text:style-name="T6">M</text:span><text:span text:style-name="T6"> </text:span><text:span text:style-name="T6">2</text:span><text:span text:style-name="T6">/</text:span><text:span text:style-name="T6">5</text:span><text:span text:style-name="T6"> </text:span></text:p>
          </draw:text-box>
        </draw:frame>
        <draw:frame draw:style-name="gr4" draw:text-style-name="P5" draw:layer="layout" svg:width="3.875cm" svg:height="0.39cm" svg:x="8.896cm" svg:y="7.308cm">
          <draw:text-box>
            <text:p text:style-name="P1"><text:span text:style-name="T6">2</text:span><text:span text:style-name="T6">0</text:span><text:span text:style-name="T6">2</text:span><text:span text:style-name="T6">5</text:span><text:span text:style-name="T6">/</text:span><text:span text:style-name="T6">2</text:span><text:span text:style-name="T6">0</text:span><text:span text:style-name="T6">2</text:span><text:span text:style-name="T6">6</text:span><text:span text:style-name="T6"> </text:span><text:span text:style-name="T6">A</text:span><text:span text:style-name="T6">c</text:span><text:span text:style-name="T6">a</text:span><text:span text:style-name="T6">d</text:span><text:span text:style-name="T6">e</text:span><text:span text:style-name="T6">m</text:span><text:span text:style-name="T6">i</text:span><text:span text:style-name="T6">c</text:span><text:span text:style-name="T6"> </text:span><text:span text:style-name="T6">Y</text:span><text:span text:style-name="T6">e</text:span><text:span text:style-name="T6">a</text:span><text:span text:style-name="T6">r</text:span><text:span text:style-name="T6"> </text:span></text:p>
          </draw:text-box>
        </draw:frame>
        <draw:polygon draw:style-name="gr5" draw:text-style-name="P6" draw:layer="layout" svg:width="16.614cm" svg:height="0.051cm" svg:x="2.49cm" svg:y="8.187cm" svg:viewBox="0 0 16615 52" draw:points="0,0 16615,0 16615,52 0,52">
          <text:p/>
        </draw:polygon>
        <draw:frame draw:style-name="gr6" draw:text-style-name="P7" draw:layer="layout" svg:width="0.422cm" svg:height="0.471cm" svg:x="2.541cm" svg:y="7.713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35cm" svg:height="0.39cm" svg:x="2.541cm" svg:y="8.25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2.8cm" svg:height="0.39cm" svg:x="2.541cm" svg:y="8.658cm">
          <draw:text-box>
            <text:p text:style-name="P1"><text:span text:style-name="T8">SECTION A: STUDENT ‘S DETAILS </text:span><text:span text:style-name="T8">(TO BE COMPLETED BY THE </text:span><text:span text:style-name="T8">STUDENT) </text:span></text:p>
          </draw:text-box>
        </draw:frame>
        <draw:frame draw:style-name="gr4" draw:text-style-name="P5" draw:layer="layout" svg:width="0.35cm" svg:height="0.39cm" svg:x="16.514cm" svg:y="8.658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6.487cm" svg:height="0.39cm" svg:x="2.541cm" svg:y="9.489cm">
          <draw:text-box>
            <text:p text:style-name="P1"><text:span text:style-name="T6">FIRST NAME</text:span><text:span text:style-name="T9">:…………………………</text:span><text:span text:style-name="T9">MIDDLE </text:span><text:span text:style-name="T9">NAME………………………….SURNAME</text:span><text:span text:style-name="T9">……………………</text:span><text:span text:style-name="T6">. </text:span></text:p>
          </draw:text-box>
        </draw:frame>
        <draw:frame draw:style-name="gr4" draw:text-style-name="P5" draw:layer="layout" svg:width="16.526cm" svg:height="0.39cm" svg:x="2.541cm" svg:y="10.382cm">
          <draw:text-box>
            <text:p text:style-name="P1"><text:span text:style-name="T9">P</text:span><text:span text:style-name="T9">R</text:span><text:span text:style-name="T9">O</text:span><text:span text:style-name="T9">G</text:span><text:span text:style-name="T9">R</text:span><text:span text:style-name="T9">A</text:span><text:span text:style-name="T9">M</text:span><text:span text:style-name="T9">M</text:span><text:span text:style-name="T9">E</text:span><text:span text:style-name="T9"> </text:span><text:span text:style-name="T9">A</text:span><text:span text:style-name="T9">D</text:span><text:span text:style-name="T9">M</text:span><text:span text:style-name="T9">I</text:span><text:span text:style-name="T9">T</text:span><text:span text:style-name="T9">T</text:span><text:span text:style-name="T9">E</text:span><text:span text:style-name="T9">D</text:span><text:span text:style-name="T9"> </text:span><text:span text:style-name="T9">T</text:span><text:span text:style-name="T9">O</text:span><text:span text:style-name="T9">: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9">…</text:span><text:span text:style-name="T6">.</text:span><text:span text:style-name="T6">.</text:span><text:span text:style-name="T6">.</text:span><text:span text:style-name="T6">. </text:span></text:p>
          </draw:text-box>
        </draw:frame>
        <draw:frame draw:style-name="gr4" draw:text-style-name="P5" draw:layer="layout" svg:width="16.458cm" svg:height="0.39cm" svg:x="2.541cm" svg:y="11.271cm">
          <draw:text-box>
            <text:p text:style-name="P1"><text:span text:style-name="T9">REGISTRATION </text:span><text:span text:style-name="T9">NUMBER:…………………………………………………………………</text:span><text:span text:style-name="T9">….</text:span><text:span text:style-name="T6">................................. </text:span></text:p>
          </draw:text-box>
        </draw:frame>
        <draw:frame draw:style-name="gr4" draw:text-style-name="P5" draw:layer="layout" svg:width="6.102cm" svg:height="0.39cm" svg:x="2.541cm" svg:y="12.16cm">
          <draw:text-box>
            <text:p text:style-name="P1"><text:span text:style-name="T9">YEAR OF </text:span><text:span text:style-name="T9">STUDY:……………………… </text:span></text:p>
          </draw:text-box>
        </draw:frame>
        <draw:frame draw:style-name="gr4" draw:text-style-name="P5" draw:layer="layout" svg:width="0.35cm" svg:height="0.39cm" svg:x="8.892cm" svg:y="12.1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8.854cm" svg:height="0.39cm" svg:x="10.162cm" svg:y="12.16cm">
          <draw:text-box>
            <text:p text:style-name="P1"><text:span text:style-name="T9">DATE:………………………………………</text:span><text:span text:style-name="T9">……………….</text:span><text:span text:style-name="T6">... </text:span></text:p>
          </draw:text-box>
        </draw:frame>
        <draw:frame draw:style-name="gr4" draw:text-style-name="P5" draw:layer="layout" svg:width="6.082cm" svg:height="0.39cm" svg:x="2.541cm" svg:y="13.049cm">
          <draw:text-box>
            <text:p text:style-name="P1"><text:span text:style-name="T6">TEL NO.</text:span><text:span text:style-name="T9">:………………………………… </text:span></text:p>
          </draw:text-box>
        </draw:frame>
        <draw:frame draw:style-name="gr4" draw:text-style-name="P5" draw:layer="layout" svg:width="0.35cm" svg:height="0.39cm" svg:x="8.892cm" svg:y="13.04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8.816cm" svg:height="0.39cm" svg:x="10.162cm" svg:y="13.049cm">
          <draw:text-box>
            <text:p text:style-name="P1"><text:span text:style-name="T6">E-</text:span><text:span text:style-name="T9">MAIL ADDRESS:…………………………………………</text:span><text:span text:style-name="T6">. </text:span></text:p>
          </draw:text-box>
        </draw:frame>
        <draw:frame draw:style-name="gr4" draw:text-style-name="P5" draw:layer="layout" svg:width="15.65cm" svg:height="0.39cm" svg:x="2.541cm" svg:y="13.942cm">
          <draw:text-box>
            <text:p text:style-name="P1"><text:span text:style-name="T5">SECTION B: <text:s/>PRESENTATION AND VERIFICATION OF DOCUMENTS (TO BE FILLED BY THE </text:span></text:p>
          </draw:text-box>
        </draw:frame>
        <draw:frame draw:style-name="gr4" draw:text-style-name="P5" draw:layer="layout" svg:width="6.2cm" svg:height="0.39cm" svg:x="2.541cm" svg:y="14.404cm">
          <draw:text-box>
            <text:p text:style-name="P1"><text:span text:style-name="T5">VERIFYING ADMISSIONS OFFICER) </text:span></text:p>
          </draw:text-box>
        </draw:frame>
        <draw:frame draw:style-name="gr4" draw:text-style-name="P5" draw:layer="layout" svg:width="0.91cm" svg:height="0.39cm" svg:x="2.541cm" svg:y="15.243cm">
          <draw:text-box>
            <text:p text:style-name="P1"><text:span text:style-name="T5">S/NO </text:span></text:p>
          </draw:text-box>
        </draw:frame>
        <draw:frame draw:style-name="gr4" draw:text-style-name="P5" draw:layer="layout" svg:width="3.34cm" svg:height="0.39cm" svg:x="3.98cm" svg:y="15.243cm">
          <draw:text-box>
            <text:p text:style-name="P1"><text:span text:style-name="T5">DOCUMENT NAME </text:span></text:p>
          </draw:text-box>
        </draw:frame>
        <draw:frame draw:style-name="gr4" draw:text-style-name="P5" draw:layer="layout" svg:width="3.281cm" svg:height="0.39cm" svg:x="10.983cm" svg:y="15.243cm">
          <draw:text-box>
            <text:p text:style-name="P1"><text:span text:style-name="T5">DOCUMENT CODE </text:span></text:p>
          </draw:text-box>
        </draw:frame>
        <draw:polygon draw:style-name="gr5" draw:text-style-name="P6" draw:layer="layout" svg:width="0.017cm" svg:height="0.018cm" svg:x="2.341cm" svg:y="15.207cm" svg:viewBox="0 0 18 19" draw:points="0,0 18,0 18,19 0,19">
          <text:p/>
        </draw:polygon>
        <draw:polygon draw:style-name="gr5" draw:text-style-name="P6" draw:layer="layout" svg:width="0.017cm" svg:height="0.018cm" svg:x="2.341cm" svg:y="15.207cm" svg:viewBox="0 0 18 19" draw:points="0,0 18,0 18,19 0,19">
          <text:p/>
        </draw:polygon>
        <draw:polygon draw:style-name="gr5" draw:text-style-name="P6" draw:layer="layout" svg:width="1.423cm" svg:height="0.018cm" svg:x="2.358cm" svg:y="15.207cm" svg:viewBox="0 0 1424 19" draw:points="0,0 1424,0 1424,19 0,19">
          <text:p/>
        </draw:polygon>
        <draw:polygon draw:style-name="gr5" draw:text-style-name="P6" draw:layer="layout" svg:width="0.017cm" svg:height="0.018cm" svg:x="3.781cm" svg:y="15.207cm" svg:viewBox="0 0 18 19" draw:points="0,0 18,0 18,19 0,19">
          <text:p/>
        </draw:polygon>
        <draw:polygon draw:style-name="gr5" draw:text-style-name="P6" draw:layer="layout" svg:width="6.985cm" svg:height="0.018cm" svg:x="3.798cm" svg:y="15.207cm" svg:viewBox="0 0 6986 19" draw:points="0,0 6986,0 6986,19 0,19">
          <text:p/>
        </draw:polygon>
        <draw:polygon draw:style-name="gr5" draw:text-style-name="P6" draw:layer="layout" svg:width="0.016cm" svg:height="0.018cm" svg:x="10.784cm" svg:y="15.207cm" svg:viewBox="0 0 17 19" draw:points="0,0 17,0 17,19 0,19">
          <text:p/>
        </draw:polygon>
        <draw:polygon draw:style-name="gr5" draw:text-style-name="P6" draw:layer="layout" svg:width="5.988cm" svg:height="0.018cm" svg:x="10.8cm" svg:y="15.207cm" svg:viewBox="0 0 5989 19" draw:points="0,0 5989,0 5989,19 0,19">
          <text:p/>
        </draw:polygon>
        <draw:polygon draw:style-name="gr5" draw:text-style-name="P6" draw:layer="layout" svg:width="0.017cm" svg:height="0.018cm" svg:x="16.788cm" svg:y="15.207cm" svg:viewBox="0 0 18 19" draw:points="0,0 18,0 18,19 0,19">
          <text:p/>
        </draw:polygon>
        <draw:polygon draw:style-name="gr5" draw:text-style-name="P6" draw:layer="layout" svg:width="2.43cm" svg:height="0.018cm" svg:x="16.805cm" svg:y="15.207cm" svg:viewBox="0 0 2431 19" draw:points="0,0 2431,0 2431,19 0,19">
          <text:p/>
        </draw:polygon>
        <draw:polygon draw:style-name="gr5" draw:text-style-name="P6" draw:layer="layout" svg:width="0.017cm" svg:height="0.018cm" svg:x="19.235cm" svg:y="15.207cm" svg:viewBox="0 0 18 19" draw:points="0,0 18,0 18,19 0,19">
          <text:p/>
        </draw:polygon>
        <draw:polygon draw:style-name="gr5" draw:text-style-name="P6" draw:layer="layout" svg:width="0.017cm" svg:height="0.018cm" svg:x="19.235cm" svg:y="15.207cm" svg:viewBox="0 0 18 19" draw:points="0,0 18,0 18,19 0,19">
          <text:p/>
        </draw:polygon>
        <draw:polygon draw:style-name="gr5" draw:text-style-name="P6" draw:layer="layout" svg:width="0.017cm" svg:height="0.992cm" svg:x="2.341cm" svg:y="15.224cm" svg:viewBox="0 0 18 993" draw:points="0,0 18,0 18,993 0,993">
          <text:p/>
        </draw:polygon>
        <draw:polygon draw:style-name="gr5" draw:text-style-name="P6" draw:layer="layout" svg:width="0.017cm" svg:height="0.992cm" svg:x="3.781cm" svg:y="15.224cm" svg:viewBox="0 0 18 993" draw:points="0,0 18,0 18,993 0,993">
          <text:p/>
        </draw:polygon>
        <draw:polygon draw:style-name="gr5" draw:text-style-name="P6" draw:layer="layout" svg:width="0.016cm" svg:height="0.992cm" svg:x="10.784cm" svg:y="15.224cm" svg:viewBox="0 0 17 993" draw:points="0,0 17,0 17,993 0,993">
          <text:p/>
        </draw:polygon>
        <draw:polygon draw:style-name="gr5" draw:text-style-name="P6" draw:layer="layout" svg:width="0.017cm" svg:height="0.992cm" svg:x="16.788cm" svg:y="15.224cm" svg:viewBox="0 0 18 993" draw:points="0,0 18,0 18,993 0,993">
          <text:p/>
        </draw:polygon>
        <draw:polygon draw:style-name="gr5" draw:text-style-name="P6" draw:layer="layout" svg:width="0.017cm" svg:height="0.992cm" svg:x="19.235cm" svg:y="15.224cm" svg:viewBox="0 0 18 993" draw:points="0,0 18,0 18,993 0,993">
          <text:p/>
        </draw:polygon>
        <draw:frame draw:style-name="gr4" draw:text-style-name="P5" draw:layer="layout" svg:width="1.886cm" svg:height="0.39cm" svg:x="16.988cm" svg:y="15.243cm">
          <draw:text-box>
            <text:p text:style-name="P1"><text:span text:style-name="T5">REMARKS </text:span></text:p>
          </draw:text-box>
        </draw:frame>
        <draw:frame draw:style-name="gr4" draw:text-style-name="P5" draw:layer="layout" svg:width="0.35cm" svg:height="0.39cm" svg:x="2.541cm" svg:y="16.25cm">
          <draw:text-box>
            <text:p text:style-name="P1"><text:span text:style-name="T6">1 </text:span></text:p>
          </draw:text-box>
        </draw:frame>
        <draw:frame draw:style-name="gr4" draw:text-style-name="P5" draw:layer="layout" svg:width="5.028cm" svg:height="0.39cm" svg:x="3.98cm" svg:y="16.25cm">
          <draw:text-box>
            <text:p text:style-name="P1"><text:span text:style-name="T6">Original Copy of Admission Letter </text:span></text:p>
          </draw:text-box>
        </draw:frame>
        <draw:frame draw:style-name="gr4" draw:text-style-name="P5" draw:layer="layout" svg:width="0.35cm" svg:height="0.39cm" svg:x="3.98cm" svg:y="16.65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cm" svg:height="0.39cm" svg:x="10.983cm" svg:y="16.25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0.017cm" svg:height="0.017cm" svg:x="2.341cm" svg:y="16.216cm" svg:viewBox="0 0 18 18" draw:points="0,0 18,0 18,18 0,18">
          <text:p/>
        </draw:polygon>
        <draw:polygon draw:style-name="gr5" draw:text-style-name="P6" draw:layer="layout" svg:width="1.423cm" svg:height="0.017cm" svg:x="2.358cm" svg:y="16.216cm" svg:viewBox="0 0 1424 18" draw:points="0,0 1424,0 1424,18 0,18">
          <text:p/>
        </draw:polygon>
        <draw:polygon draw:style-name="gr5" draw:text-style-name="P6" draw:layer="layout" svg:width="0.017cm" svg:height="0.017cm" svg:x="3.781cm" svg:y="16.216cm" svg:viewBox="0 0 18 18" draw:points="0,0 18,0 18,18 0,18">
          <text:p/>
        </draw:polygon>
        <draw:polygon draw:style-name="gr5" draw:text-style-name="P6" draw:layer="layout" svg:width="6.985cm" svg:height="0.017cm" svg:x="3.798cm" svg:y="16.216cm" svg:viewBox="0 0 6986 18" draw:points="0,0 6986,0 6986,18 0,18">
          <text:p/>
        </draw:polygon>
        <draw:polygon draw:style-name="gr5" draw:text-style-name="P6" draw:layer="layout" svg:width="0.016cm" svg:height="0.017cm" svg:x="10.784cm" svg:y="16.216cm" svg:viewBox="0 0 17 18" draw:points="0,0 17,0 17,18 0,18">
          <text:p/>
        </draw:polygon>
        <draw:polygon draw:style-name="gr5" draw:text-style-name="P6" draw:layer="layout" svg:width="5.988cm" svg:height="0.017cm" svg:x="10.8cm" svg:y="16.216cm" svg:viewBox="0 0 5989 18" draw:points="0,0 5989,0 5989,18 0,18">
          <text:p/>
        </draw:polygon>
        <draw:polygon draw:style-name="gr5" draw:text-style-name="P6" draw:layer="layout" svg:width="0.017cm" svg:height="0.017cm" svg:x="16.788cm" svg:y="16.216cm" svg:viewBox="0 0 18 18" draw:points="0,0 18,0 18,18 0,18">
          <text:p/>
        </draw:polygon>
        <draw:polygon draw:style-name="gr5" draw:text-style-name="P6" draw:layer="layout" svg:width="2.43cm" svg:height="0.017cm" svg:x="16.805cm" svg:y="16.216cm" svg:viewBox="0 0 2431 18" draw:points="0,0 2431,0 2431,18 0,18">
          <text:p/>
        </draw:polygon>
        <draw:polygon draw:style-name="gr5" draw:text-style-name="P6" draw:layer="layout" svg:width="0.017cm" svg:height="0.017cm" svg:x="19.235cm" svg:y="16.216cm" svg:viewBox="0 0 18 18" draw:points="0,0 18,0 18,18 0,18">
          <text:p/>
        </draw:polygon>
        <draw:polygon draw:style-name="gr5" draw:text-style-name="P6" draw:layer="layout" svg:width="0.017cm" svg:height="0.808cm" svg:x="2.341cm" svg:y="16.233cm" svg:viewBox="0 0 18 809" draw:points="0,0 18,0 18,809 0,809">
          <text:p/>
        </draw:polygon>
        <draw:polygon draw:style-name="gr5" draw:text-style-name="P6" draw:layer="layout" svg:width="0.017cm" svg:height="0.808cm" svg:x="3.781cm" svg:y="16.233cm" svg:viewBox="0 0 18 809" draw:points="0,0 18,0 18,809 0,809">
          <text:p/>
        </draw:polygon>
        <draw:polygon draw:style-name="gr5" draw:text-style-name="P6" draw:layer="layout" svg:width="0.016cm" svg:height="0.808cm" svg:x="10.784cm" svg:y="16.233cm" svg:viewBox="0 0 17 809" draw:points="0,0 17,0 17,809 0,809">
          <text:p/>
        </draw:polygon>
        <draw:polygon draw:style-name="gr5" draw:text-style-name="P6" draw:layer="layout" svg:width="0.017cm" svg:height="0.808cm" svg:x="16.788cm" svg:y="16.233cm" svg:viewBox="0 0 18 809" draw:points="0,0 18,0 18,809 0,809">
          <text:p/>
        </draw:polygon>
        <draw:polygon draw:style-name="gr5" draw:text-style-name="P6" draw:layer="layout" svg:width="0.017cm" svg:height="0.808cm" svg:x="19.235cm" svg:y="16.233cm" svg:viewBox="0 0 18 809" draw:points="0,0 18,0 18,809 0,809">
          <text:p/>
        </draw:polygon>
        <draw:frame draw:style-name="gr4" draw:text-style-name="P5" draw:layer="layout" svg:width="0.35cm" svg:height="0.39cm" svg:x="16.988cm" svg:y="16.2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cm" svg:height="0.39cm" svg:x="2.541cm" svg:y="17.076cm">
          <draw:text-box>
            <text:p text:style-name="P1"><text:span text:style-name="T6">2 </text:span></text:p>
          </draw:text-box>
        </draw:frame>
        <draw:frame draw:style-name="gr4" draw:text-style-name="P5" draw:layer="layout" svg:width="5.076cm" svg:height="0.39cm" svg:x="3.98cm" svg:y="17.076cm">
          <draw:text-box>
            <text:p text:style-name="P1"><text:span text:style-name="T6">Original National ID Card/Passport </text:span></text:p>
          </draw:text-box>
        </draw:frame>
        <draw:frame draw:style-name="gr4" draw:text-style-name="P5" draw:layer="layout" svg:width="0.35cm" svg:height="0.39cm" svg:x="10.983cm" svg:y="17.076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0.017cm" svg:height="0.017cm" svg:x="2.341cm" svg:y="17.041cm" svg:viewBox="0 0 18 18" draw:points="0,0 18,0 18,18 0,18">
          <text:p/>
        </draw:polygon>
        <draw:polygon draw:style-name="gr5" draw:text-style-name="P6" draw:layer="layout" svg:width="1.423cm" svg:height="0.017cm" svg:x="2.358cm" svg:y="17.041cm" svg:viewBox="0 0 1424 18" draw:points="0,0 1424,0 1424,18 0,18">
          <text:p/>
        </draw:polygon>
        <draw:polygon draw:style-name="gr5" draw:text-style-name="P6" draw:layer="layout" svg:width="0.017cm" svg:height="0.017cm" svg:x="3.781cm" svg:y="17.041cm" svg:viewBox="0 0 18 18" draw:points="0,0 18,0 18,18 0,18">
          <text:p/>
        </draw:polygon>
        <draw:polygon draw:style-name="gr5" draw:text-style-name="P6" draw:layer="layout" svg:width="6.985cm" svg:height="0.017cm" svg:x="3.798cm" svg:y="17.041cm" svg:viewBox="0 0 6986 18" draw:points="0,0 6986,0 6986,18 0,18">
          <text:p/>
        </draw:polygon>
        <draw:polygon draw:style-name="gr5" draw:text-style-name="P6" draw:layer="layout" svg:width="0.016cm" svg:height="0.017cm" svg:x="10.784cm" svg:y="17.041cm" svg:viewBox="0 0 17 18" draw:points="0,0 17,0 17,18 0,18">
          <text:p/>
        </draw:polygon>
        <draw:polygon draw:style-name="gr5" draw:text-style-name="P6" draw:layer="layout" svg:width="5.988cm" svg:height="0.017cm" svg:x="10.8cm" svg:y="17.041cm" svg:viewBox="0 0 5989 18" draw:points="0,0 5989,0 5989,18 0,18">
          <text:p/>
        </draw:polygon>
        <draw:polygon draw:style-name="gr5" draw:text-style-name="P6" draw:layer="layout" svg:width="0.017cm" svg:height="0.017cm" svg:x="16.788cm" svg:y="17.041cm" svg:viewBox="0 0 18 18" draw:points="0,0 18,0 18,18 0,18">
          <text:p/>
        </draw:polygon>
        <draw:polygon draw:style-name="gr5" draw:text-style-name="P6" draw:layer="layout" svg:width="2.43cm" svg:height="0.017cm" svg:x="16.805cm" svg:y="17.041cm" svg:viewBox="0 0 2431 18" draw:points="0,0 2431,0 2431,18 0,18">
          <text:p/>
        </draw:polygon>
        <draw:polygon draw:style-name="gr5" draw:text-style-name="P6" draw:layer="layout" svg:width="0.017cm" svg:height="0.017cm" svg:x="19.235cm" svg:y="17.041cm" svg:viewBox="0 0 18 18" draw:points="0,0 18,0 18,18 0,18">
          <text:p/>
        </draw:polygon>
        <draw:polygon draw:style-name="gr5" draw:text-style-name="P6" draw:layer="layout" svg:width="0.017cm" svg:height="1.05cm" svg:x="2.341cm" svg:y="17.058cm" svg:viewBox="0 0 18 1051" draw:points="0,0 18,0 18,1051 0,1051">
          <text:p/>
        </draw:polygon>
        <draw:polygon draw:style-name="gr5" draw:text-style-name="P6" draw:layer="layout" svg:width="0.017cm" svg:height="1.05cm" svg:x="3.781cm" svg:y="17.058cm" svg:viewBox="0 0 18 1051" draw:points="0,0 18,0 18,1051 0,1051">
          <text:p/>
        </draw:polygon>
        <draw:polygon draw:style-name="gr5" draw:text-style-name="P6" draw:layer="layout" svg:width="0.016cm" svg:height="1.05cm" svg:x="10.784cm" svg:y="17.058cm" svg:viewBox="0 0 17 1051" draw:points="0,0 17,0 17,1051 0,1051">
          <text:p/>
        </draw:polygon>
        <draw:polygon draw:style-name="gr5" draw:text-style-name="P6" draw:layer="layout" svg:width="0.017cm" svg:height="1.05cm" svg:x="16.788cm" svg:y="17.058cm" svg:viewBox="0 0 18 1051" draw:points="0,0 18,0 18,1051 0,1051">
          <text:p/>
        </draw:polygon>
        <draw:polygon draw:style-name="gr5" draw:text-style-name="P6" draw:layer="layout" svg:width="0.017cm" svg:height="1.05cm" svg:x="19.235cm" svg:y="17.058cm" svg:viewBox="0 0 18 1051" draw:points="0,0 18,0 18,1051 0,1051">
          <text:p/>
        </draw:polygon>
        <draw:frame draw:style-name="gr4" draw:text-style-name="P5" draw:layer="layout" svg:width="0.35cm" svg:height="0.39cm" svg:x="16.988cm" svg:y="17.07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cm" svg:height="0.39cm" svg:x="2.541cm" svg:y="18.143cm">
          <draw:text-box>
            <text:p text:style-name="P1"><text:span text:style-name="T6">3 </text:span></text:p>
          </draw:text-box>
        </draw:frame>
        <draw:frame draw:style-name="gr4" draw:text-style-name="P5" draw:layer="layout" svg:width="3.641cm" svg:height="0.39cm" svg:x="3.98cm" svg:y="18.143cm">
          <draw:text-box>
            <text:p text:style-name="P1"><text:span text:style-name="T6">Original Birth Certificate </text:span></text:p>
          </draw:text-box>
        </draw:frame>
        <draw:frame draw:style-name="gr4" draw:text-style-name="P5" draw:layer="layout" svg:width="0.35cm" svg:height="0.39cm" svg:x="10.983cm" svg:y="18.143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0.017cm" svg:height="0.017cm" svg:x="2.341cm" svg:y="18.108cm" svg:viewBox="0 0 18 18" draw:points="0,0 18,0 18,18 0,18">
          <text:p/>
        </draw:polygon>
        <draw:polygon draw:style-name="gr5" draw:text-style-name="P6" draw:layer="layout" svg:width="1.423cm" svg:height="0.017cm" svg:x="2.358cm" svg:y="18.108cm" svg:viewBox="0 0 1424 18" draw:points="0,0 1424,0 1424,18 0,18">
          <text:p/>
        </draw:polygon>
        <draw:polygon draw:style-name="gr5" draw:text-style-name="P6" draw:layer="layout" svg:width="0.017cm" svg:height="0.017cm" svg:x="3.781cm" svg:y="18.108cm" svg:viewBox="0 0 18 18" draw:points="0,0 18,0 18,18 0,18">
          <text:p/>
        </draw:polygon>
        <draw:polygon draw:style-name="gr5" draw:text-style-name="P6" draw:layer="layout" svg:width="6.985cm" svg:height="0.017cm" svg:x="3.798cm" svg:y="18.108cm" svg:viewBox="0 0 6986 18" draw:points="0,0 6986,0 6986,18 0,18">
          <text:p/>
        </draw:polygon>
        <draw:polygon draw:style-name="gr5" draw:text-style-name="P6" draw:layer="layout" svg:width="0.016cm" svg:height="0.017cm" svg:x="10.784cm" svg:y="18.108cm" svg:viewBox="0 0 17 18" draw:points="0,0 17,0 17,18 0,18">
          <text:p/>
        </draw:polygon>
        <draw:polygon draw:style-name="gr5" draw:text-style-name="P6" draw:layer="layout" svg:width="5.988cm" svg:height="0.017cm" svg:x="10.8cm" svg:y="18.108cm" svg:viewBox="0 0 5989 18" draw:points="0,0 5989,0 5989,18 0,18">
          <text:p/>
        </draw:polygon>
        <draw:polygon draw:style-name="gr5" draw:text-style-name="P6" draw:layer="layout" svg:width="0.017cm" svg:height="0.017cm" svg:x="16.788cm" svg:y="18.108cm" svg:viewBox="0 0 18 18" draw:points="0,0 18,0 18,18 0,18">
          <text:p/>
        </draw:polygon>
        <draw:polygon draw:style-name="gr5" draw:text-style-name="P6" draw:layer="layout" svg:width="2.43cm" svg:height="0.017cm" svg:x="16.805cm" svg:y="18.108cm" svg:viewBox="0 0 2431 18" draw:points="0,0 2431,0 2431,18 0,18">
          <text:p/>
        </draw:polygon>
        <draw:polygon draw:style-name="gr5" draw:text-style-name="P6" draw:layer="layout" svg:width="0.017cm" svg:height="0.017cm" svg:x="19.235cm" svg:y="18.108cm" svg:viewBox="0 0 18 18" draw:points="0,0 18,0 18,18 0,18">
          <text:p/>
        </draw:polygon>
        <draw:polygon draw:style-name="gr5" draw:text-style-name="P6" draw:layer="layout" svg:width="0.017cm" svg:height="1.05cm" svg:x="2.341cm" svg:y="18.125cm" svg:viewBox="0 0 18 1051" draw:points="0,0 18,0 18,1051 0,1051">
          <text:p/>
        </draw:polygon>
        <draw:polygon draw:style-name="gr5" draw:text-style-name="P6" draw:layer="layout" svg:width="0.017cm" svg:height="1.05cm" svg:x="3.781cm" svg:y="18.125cm" svg:viewBox="0 0 18 1051" draw:points="0,0 18,0 18,1051 0,1051">
          <text:p/>
        </draw:polygon>
        <draw:polygon draw:style-name="gr5" draw:text-style-name="P6" draw:layer="layout" svg:width="0.016cm" svg:height="1.05cm" svg:x="10.784cm" svg:y="18.125cm" svg:viewBox="0 0 17 1051" draw:points="0,0 17,0 17,1051 0,1051">
          <text:p/>
        </draw:polygon>
        <draw:polygon draw:style-name="gr5" draw:text-style-name="P6" draw:layer="layout" svg:width="0.017cm" svg:height="1.05cm" svg:x="16.788cm" svg:y="18.125cm" svg:viewBox="0 0 18 1051" draw:points="0,0 18,0 18,1051 0,1051">
          <text:p/>
        </draw:polygon>
        <draw:polygon draw:style-name="gr5" draw:text-style-name="P6" draw:layer="layout" svg:width="0.017cm" svg:height="1.05cm" svg:x="19.235cm" svg:y="18.125cm" svg:viewBox="0 0 18 1051" draw:points="0,0 18,0 18,1051 0,1051">
          <text:p/>
        </draw:polygon>
        <draw:frame draw:style-name="gr4" draw:text-style-name="P5" draw:layer="layout" svg:width="0.35cm" svg:height="0.39cm" svg:x="16.988cm" svg:y="18.14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cm" svg:height="0.39cm" svg:x="2.541cm" svg:y="19.209cm">
          <draw:text-box>
            <text:p text:style-name="P1"><text:span text:style-name="T6">4 </text:span></text:p>
          </draw:text-box>
        </draw:frame>
        <draw:frame draw:style-name="gr4" draw:text-style-name="P5" draw:layer="layout" svg:width="2.773cm" svg:height="0.39cm" svg:x="3.98cm" svg:y="19.209cm">
          <draw:text-box>
            <text:p text:style-name="P1"><text:span text:style-name="T6">Original Academic </text:span></text:p>
          </draw:text-box>
        </draw:frame>
        <draw:frame draw:style-name="gr4" draw:text-style-name="P5" draw:layer="layout" svg:width="5.174cm" svg:height="0.39cm" svg:x="3.98cm" svg:y="19.611cm">
          <draw:text-box>
            <text:p text:style-name="P1"><text:span text:style-name="T6">Certificates/Transcripts/Result Slips </text:span></text:p>
          </draw:text-box>
        </draw:frame>
        <draw:frame draw:style-name="gr4" draw:text-style-name="P5" draw:layer="layout" svg:width="0.35cm" svg:height="0.39cm" svg:x="10.983cm" svg:y="19.209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0.017cm" svg:height="0.018cm" svg:x="2.341cm" svg:y="19.175cm" svg:viewBox="0 0 18 19" draw:points="0,0 18,0 18,19 0,19">
          <text:p/>
        </draw:polygon>
        <draw:polygon draw:style-name="gr5" draw:text-style-name="P6" draw:layer="layout" svg:width="1.423cm" svg:height="0.018cm" svg:x="2.358cm" svg:y="19.175cm" svg:viewBox="0 0 1424 19" draw:points="0,0 1424,0 1424,19 0,19">
          <text:p/>
        </draw:polygon>
        <draw:polygon draw:style-name="gr5" draw:text-style-name="P6" draw:layer="layout" svg:width="0.017cm" svg:height="0.018cm" svg:x="3.781cm" svg:y="19.175cm" svg:viewBox="0 0 18 19" draw:points="0,0 18,0 18,19 0,19">
          <text:p/>
        </draw:polygon>
        <draw:polygon draw:style-name="gr5" draw:text-style-name="P6" draw:layer="layout" svg:width="6.985cm" svg:height="0.018cm" svg:x="3.798cm" svg:y="19.175cm" svg:viewBox="0 0 6986 19" draw:points="0,0 6986,0 6986,19 0,19">
          <text:p/>
        </draw:polygon>
        <draw:polygon draw:style-name="gr5" draw:text-style-name="P6" draw:layer="layout" svg:width="0.016cm" svg:height="0.018cm" svg:x="10.784cm" svg:y="19.175cm" svg:viewBox="0 0 17 19" draw:points="0,0 17,0 17,19 0,19">
          <text:p/>
        </draw:polygon>
        <draw:polygon draw:style-name="gr5" draw:text-style-name="P6" draw:layer="layout" svg:width="5.988cm" svg:height="0.018cm" svg:x="10.8cm" svg:y="19.175cm" svg:viewBox="0 0 5989 19" draw:points="0,0 5989,0 5989,19 0,19">
          <text:p/>
        </draw:polygon>
        <draw:polygon draw:style-name="gr5" draw:text-style-name="P6" draw:layer="layout" svg:width="0.017cm" svg:height="0.018cm" svg:x="16.788cm" svg:y="19.175cm" svg:viewBox="0 0 18 19" draw:points="0,0 18,0 18,19 0,19">
          <text:p/>
        </draw:polygon>
        <draw:polygon draw:style-name="gr5" draw:text-style-name="P6" draw:layer="layout" svg:width="2.43cm" svg:height="0.018cm" svg:x="16.805cm" svg:y="19.175cm" svg:viewBox="0 0 2431 19" draw:points="0,0 2431,0 2431,19 0,19">
          <text:p/>
        </draw:polygon>
        <draw:polygon draw:style-name="gr5" draw:text-style-name="P6" draw:layer="layout" svg:width="0.017cm" svg:height="0.018cm" svg:x="19.235cm" svg:y="19.175cm" svg:viewBox="0 0 18 19" draw:points="0,0 18,0 18,19 0,19">
          <text:p/>
        </draw:polygon>
        <draw:polygon draw:style-name="gr5" draw:text-style-name="P6" draw:layer="layout" svg:width="0.017cm" svg:height="1.041cm" svg:x="2.341cm" svg:y="19.192cm" svg:viewBox="0 0 18 1042" draw:points="0,0 18,0 18,1042 0,1042">
          <text:p/>
        </draw:polygon>
        <draw:polygon draw:style-name="gr5" draw:text-style-name="P6" draw:layer="layout" svg:width="0.017cm" svg:height="1.041cm" svg:x="3.781cm" svg:y="19.192cm" svg:viewBox="0 0 18 1042" draw:points="0,0 18,0 18,1042 0,1042">
          <text:p/>
        </draw:polygon>
        <draw:polygon draw:style-name="gr5" draw:text-style-name="P6" draw:layer="layout" svg:width="0.016cm" svg:height="1.041cm" svg:x="10.784cm" svg:y="19.192cm" svg:viewBox="0 0 17 1042" draw:points="0,0 17,0 17,1042 0,1042">
          <text:p/>
        </draw:polygon>
        <draw:polygon draw:style-name="gr5" draw:text-style-name="P6" draw:layer="layout" svg:width="0.017cm" svg:height="1.041cm" svg:x="16.788cm" svg:y="19.192cm" svg:viewBox="0 0 18 1042" draw:points="0,0 18,0 18,1042 0,1042">
          <text:p/>
        </draw:polygon>
        <draw:polygon draw:style-name="gr5" draw:text-style-name="P6" draw:layer="layout" svg:width="0.017cm" svg:height="1.041cm" svg:x="19.235cm" svg:y="19.192cm" svg:viewBox="0 0 18 1042" draw:points="0,0 18,0 18,1042 0,1042">
          <text:p/>
        </draw:polygon>
        <draw:frame draw:style-name="gr4" draw:text-style-name="P5" draw:layer="layout" svg:width="0.35cm" svg:height="0.39cm" svg:x="16.988cm" svg:y="19.20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cm" svg:height="0.39cm" svg:x="2.541cm" svg:y="20.268cm">
          <draw:text-box>
            <text:p text:style-name="P1"><text:span text:style-name="T6">5 </text:span></text:p>
          </draw:text-box>
        </draw:frame>
        <draw:frame draw:style-name="gr4" draw:text-style-name="P5" draw:layer="layout" svg:width="5.135cm" svg:height="0.39cm" svg:x="3.98cm" svg:y="20.268cm">
          <draw:text-box>
            <text:p text:style-name="P1"><text:span text:style-name="T6">Original Secondary School Leaving </text:span></text:p>
          </draw:text-box>
        </draw:frame>
        <draw:frame draw:style-name="gr4" draw:text-style-name="P5" draw:layer="layout" svg:width="1.573cm" svg:height="0.39cm" svg:x="3.98cm" svg:y="20.67cm">
          <draw:text-box>
            <text:p text:style-name="P1"><text:span text:style-name="T6">Certificate </text:span></text:p>
          </draw:text-box>
        </draw:frame>
        <draw:frame draw:style-name="gr4" draw:text-style-name="P5" draw:layer="layout" svg:width="0.35cm" svg:height="0.39cm" svg:x="10.983cm" svg:y="20.268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0.017cm" svg:height="0.017cm" svg:x="2.341cm" svg:y="20.233cm" svg:viewBox="0 0 18 18" draw:points="0,0 18,0 18,18 0,18">
          <text:p/>
        </draw:polygon>
        <draw:polygon draw:style-name="gr5" draw:text-style-name="P6" draw:layer="layout" svg:width="1.423cm" svg:height="0.017cm" svg:x="2.358cm" svg:y="20.233cm" svg:viewBox="0 0 1424 18" draw:points="0,0 1424,0 1424,18 0,18">
          <text:p/>
        </draw:polygon>
        <draw:polygon draw:style-name="gr5" draw:text-style-name="P6" draw:layer="layout" svg:width="0.017cm" svg:height="0.017cm" svg:x="3.781cm" svg:y="20.233cm" svg:viewBox="0 0 18 18" draw:points="0,0 18,0 18,18 0,18">
          <text:p/>
        </draw:polygon>
        <draw:polygon draw:style-name="gr5" draw:text-style-name="P6" draw:layer="layout" svg:width="6.985cm" svg:height="0.017cm" svg:x="3.798cm" svg:y="20.233cm" svg:viewBox="0 0 6986 18" draw:points="0,0 6986,0 6986,18 0,18">
          <text:p/>
        </draw:polygon>
        <draw:polygon draw:style-name="gr5" draw:text-style-name="P6" draw:layer="layout" svg:width="0.016cm" svg:height="0.017cm" svg:x="10.784cm" svg:y="20.233cm" svg:viewBox="0 0 17 18" draw:points="0,0 17,0 17,18 0,18">
          <text:p/>
        </draw:polygon>
        <draw:polygon draw:style-name="gr5" draw:text-style-name="P6" draw:layer="layout" svg:width="5.988cm" svg:height="0.017cm" svg:x="10.8cm" svg:y="20.233cm" svg:viewBox="0 0 5989 18" draw:points="0,0 5989,0 5989,18 0,18">
          <text:p/>
        </draw:polygon>
        <draw:polygon draw:style-name="gr5" draw:text-style-name="P6" draw:layer="layout" svg:width="0.017cm" svg:height="0.017cm" svg:x="16.788cm" svg:y="20.233cm" svg:viewBox="0 0 18 18" draw:points="0,0 18,0 18,18 0,18">
          <text:p/>
        </draw:polygon>
        <draw:polygon draw:style-name="gr5" draw:text-style-name="P6" draw:layer="layout" svg:width="2.43cm" svg:height="0.017cm" svg:x="16.805cm" svg:y="20.233cm" svg:viewBox="0 0 2431 18" draw:points="0,0 2431,0 2431,18 0,18">
          <text:p/>
        </draw:polygon>
        <draw:polygon draw:style-name="gr5" draw:text-style-name="P6" draw:layer="layout" svg:width="0.017cm" svg:height="0.017cm" svg:x="19.235cm" svg:y="20.233cm" svg:viewBox="0 0 18 18" draw:points="0,0 18,0 18,18 0,18">
          <text:p/>
        </draw:polygon>
        <draw:polygon draw:style-name="gr5" draw:text-style-name="P6" draw:layer="layout" svg:width="0.017cm" svg:height="1.041cm" svg:x="2.341cm" svg:y="20.25cm" svg:viewBox="0 0 18 1042" draw:points="0,0 18,0 18,1042 0,1042">
          <text:p/>
        </draw:polygon>
        <draw:polygon draw:style-name="gr5" draw:text-style-name="P6" draw:layer="layout" svg:width="0.017cm" svg:height="1.041cm" svg:x="3.781cm" svg:y="20.25cm" svg:viewBox="0 0 18 1042" draw:points="0,0 18,0 18,1042 0,1042">
          <text:p/>
        </draw:polygon>
        <draw:polygon draw:style-name="gr5" draw:text-style-name="P6" draw:layer="layout" svg:width="0.016cm" svg:height="1.041cm" svg:x="10.784cm" svg:y="20.25cm" svg:viewBox="0 0 17 1042" draw:points="0,0 17,0 17,1042 0,1042">
          <text:p/>
        </draw:polygon>
        <draw:polygon draw:style-name="gr5" draw:text-style-name="P6" draw:layer="layout" svg:width="0.017cm" svg:height="1.041cm" svg:x="16.788cm" svg:y="20.25cm" svg:viewBox="0 0 18 1042" draw:points="0,0 18,0 18,1042 0,1042">
          <text:p/>
        </draw:polygon>
        <draw:polygon draw:style-name="gr5" draw:text-style-name="P6" draw:layer="layout" svg:width="0.017cm" svg:height="1.041cm" svg:x="19.235cm" svg:y="20.25cm" svg:viewBox="0 0 18 1042" draw:points="0,0 18,0 18,1042 0,1042">
          <text:p/>
        </draw:polygon>
        <draw:frame draw:style-name="gr4" draw:text-style-name="P5" draw:layer="layout" svg:width="0.35cm" svg:height="0.39cm" svg:x="16.988cm" svg:y="20.26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cm" svg:height="0.39cm" svg:x="2.541cm" svg:y="21.327cm">
          <draw:text-box>
            <text:p text:style-name="P1"><text:span text:style-name="T6">6 </text:span></text:p>
          </draw:text-box>
        </draw:frame>
        <draw:frame draw:style-name="gr4" draw:text-style-name="P5" draw:layer="layout" svg:width="4.364cm" svg:height="0.39cm" svg:x="3.98cm" svg:y="21.327cm">
          <draw:text-box>
            <text:p text:style-name="P1"><text:span text:style-name="T6">Copy of National ID/ Passport </text:span></text:p>
          </draw:text-box>
        </draw:frame>
        <draw:frame draw:style-name="gr4" draw:text-style-name="P5" draw:layer="layout" svg:width="0.35cm" svg:height="0.39cm" svg:x="10.983cm" svg:y="21.327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0.017cm" svg:height="0.017cm" svg:x="2.341cm" svg:y="21.291cm" svg:viewBox="0 0 18 18" draw:points="0,0 18,0 18,18 0,18">
          <text:p/>
        </draw:polygon>
        <draw:polygon draw:style-name="gr5" draw:text-style-name="P6" draw:layer="layout" svg:width="1.423cm" svg:height="0.017cm" svg:x="2.358cm" svg:y="21.291cm" svg:viewBox="0 0 1424 18" draw:points="0,0 1424,0 1424,18 0,18">
          <text:p/>
        </draw:polygon>
        <draw:polygon draw:style-name="gr5" draw:text-style-name="P6" draw:layer="layout" svg:width="0.017cm" svg:height="0.017cm" svg:x="3.781cm" svg:y="21.291cm" svg:viewBox="0 0 18 18" draw:points="0,0 18,0 18,18 0,18">
          <text:p/>
        </draw:polygon>
        <draw:polygon draw:style-name="gr5" draw:text-style-name="P6" draw:layer="layout" svg:width="6.985cm" svg:height="0.017cm" svg:x="3.798cm" svg:y="21.291cm" svg:viewBox="0 0 6986 18" draw:points="0,0 6986,0 6986,18 0,18">
          <text:p/>
        </draw:polygon>
        <draw:polygon draw:style-name="gr5" draw:text-style-name="P6" draw:layer="layout" svg:width="0.016cm" svg:height="0.017cm" svg:x="10.784cm" svg:y="21.291cm" svg:viewBox="0 0 17 18" draw:points="0,0 17,0 17,18 0,18">
          <text:p/>
        </draw:polygon>
        <draw:polygon draw:style-name="gr5" draw:text-style-name="P6" draw:layer="layout" svg:width="5.988cm" svg:height="0.017cm" svg:x="10.8cm" svg:y="21.291cm" svg:viewBox="0 0 5989 18" draw:points="0,0 5989,0 5989,18 0,18">
          <text:p/>
        </draw:polygon>
        <draw:polygon draw:style-name="gr5" draw:text-style-name="P6" draw:layer="layout" svg:width="0.017cm" svg:height="0.017cm" svg:x="16.788cm" svg:y="21.291cm" svg:viewBox="0 0 18 18" draw:points="0,0 18,0 18,18 0,18">
          <text:p/>
        </draw:polygon>
        <draw:polygon draw:style-name="gr5" draw:text-style-name="P6" draw:layer="layout" svg:width="2.43cm" svg:height="0.017cm" svg:x="16.805cm" svg:y="21.291cm" svg:viewBox="0 0 2431 18" draw:points="0,0 2431,0 2431,18 0,18">
          <text:p/>
        </draw:polygon>
        <draw:polygon draw:style-name="gr5" draw:text-style-name="P6" draw:layer="layout" svg:width="0.017cm" svg:height="0.017cm" svg:x="19.235cm" svg:y="21.291cm" svg:viewBox="0 0 18 18" draw:points="0,0 18,0 18,18 0,18">
          <text:p/>
        </draw:polygon>
        <draw:polygon draw:style-name="gr5" draw:text-style-name="P6" draw:layer="layout" svg:width="0.017cm" svg:height="1.042cm" svg:x="2.341cm" svg:y="21.309cm" svg:viewBox="0 0 18 1043" draw:points="0,0 18,0 18,1043 0,1043">
          <text:p/>
        </draw:polygon>
        <draw:polygon draw:style-name="gr5" draw:text-style-name="P6" draw:layer="layout" svg:width="0.017cm" svg:height="1.042cm" svg:x="3.781cm" svg:y="21.309cm" svg:viewBox="0 0 18 1043" draw:points="0,0 18,0 18,1043 0,1043">
          <text:p/>
        </draw:polygon>
        <draw:polygon draw:style-name="gr5" draw:text-style-name="P6" draw:layer="layout" svg:width="0.016cm" svg:height="1.042cm" svg:x="10.784cm" svg:y="21.309cm" svg:viewBox="0 0 17 1043" draw:points="0,0 17,0 17,1043 0,1043">
          <text:p/>
        </draw:polygon>
        <draw:polygon draw:style-name="gr5" draw:text-style-name="P6" draw:layer="layout" svg:width="0.017cm" svg:height="1.042cm" svg:x="16.788cm" svg:y="21.309cm" svg:viewBox="0 0 18 1043" draw:points="0,0 18,0 18,1043 0,1043">
          <text:p/>
        </draw:polygon>
        <draw:polygon draw:style-name="gr5" draw:text-style-name="P6" draw:layer="layout" svg:width="0.017cm" svg:height="1.042cm" svg:x="19.235cm" svg:y="21.309cm" svg:viewBox="0 0 18 1043" draw:points="0,0 18,0 18,1043 0,1043">
          <text:p/>
        </draw:polygon>
        <draw:frame draw:style-name="gr4" draw:text-style-name="P5" draw:layer="layout" svg:width="0.35cm" svg:height="0.39cm" svg:x="16.988cm" svg:y="21.32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3cm" svg:height="0.39cm" svg:x="2.541cm" svg:y="22.385cm">
          <draw:text-box>
            <text:p text:style-name="P1"><text:span text:style-name="T6">7. </text:span></text:p>
          </draw:text-box>
        </draw:frame>
        <draw:frame draw:style-name="gr4" draw:text-style-name="P5" draw:layer="layout" svg:width="3.612cm" svg:height="0.39cm" svg:x="3.98cm" svg:y="22.385cm">
          <draw:text-box>
            <text:p text:style-name="P1"><text:span text:style-name="T6">Copy of Birth Certificate </text:span></text:p>
          </draw:text-box>
        </draw:frame>
        <draw:frame draw:style-name="gr4" draw:text-style-name="P5" draw:layer="layout" svg:width="0.35cm" svg:height="0.39cm" svg:x="10.983cm" svg:y="22.385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0.017cm" svg:height="0.017cm" svg:x="2.341cm" svg:y="22.351cm" svg:viewBox="0 0 18 18" draw:points="0,0 18,0 18,18 0,18">
          <text:p/>
        </draw:polygon>
        <draw:polygon draw:style-name="gr5" draw:text-style-name="P6" draw:layer="layout" svg:width="1.423cm" svg:height="0.017cm" svg:x="2.358cm" svg:y="22.351cm" svg:viewBox="0 0 1424 18" draw:points="0,0 1424,0 1424,18 0,18">
          <text:p/>
        </draw:polygon>
        <draw:polygon draw:style-name="gr5" draw:text-style-name="P6" draw:layer="layout" svg:width="0.017cm" svg:height="0.017cm" svg:x="3.781cm" svg:y="22.351cm" svg:viewBox="0 0 18 18" draw:points="0,0 18,0 18,18 0,18">
          <text:p/>
        </draw:polygon>
        <draw:polygon draw:style-name="gr5" draw:text-style-name="P6" draw:layer="layout" svg:width="6.985cm" svg:height="0.017cm" svg:x="3.798cm" svg:y="22.351cm" svg:viewBox="0 0 6986 18" draw:points="0,0 6986,0 6986,18 0,18">
          <text:p/>
        </draw:polygon>
        <draw:polygon draw:style-name="gr5" draw:text-style-name="P6" draw:layer="layout" svg:width="0.016cm" svg:height="0.017cm" svg:x="10.784cm" svg:y="22.351cm" svg:viewBox="0 0 17 18" draw:points="0,0 17,0 17,18 0,18">
          <text:p/>
        </draw:polygon>
        <draw:polygon draw:style-name="gr5" draw:text-style-name="P6" draw:layer="layout" svg:width="5.988cm" svg:height="0.017cm" svg:x="10.8cm" svg:y="22.351cm" svg:viewBox="0 0 5989 18" draw:points="0,0 5989,0 5989,18 0,18">
          <text:p/>
        </draw:polygon>
        <draw:polygon draw:style-name="gr5" draw:text-style-name="P6" draw:layer="layout" svg:width="0.017cm" svg:height="0.017cm" svg:x="16.788cm" svg:y="22.351cm" svg:viewBox="0 0 18 18" draw:points="0,0 18,0 18,18 0,18">
          <text:p/>
        </draw:polygon>
        <draw:polygon draw:style-name="gr5" draw:text-style-name="P6" draw:layer="layout" svg:width="2.43cm" svg:height="0.017cm" svg:x="16.805cm" svg:y="22.351cm" svg:viewBox="0 0 2431 18" draw:points="0,0 2431,0 2431,18 0,18">
          <text:p/>
        </draw:polygon>
        <draw:polygon draw:style-name="gr5" draw:text-style-name="P6" draw:layer="layout" svg:width="0.017cm" svg:height="0.017cm" svg:x="19.235cm" svg:y="22.351cm" svg:viewBox="0 0 18 18" draw:points="0,0 18,0 18,18 0,18">
          <text:p/>
        </draw:polygon>
        <draw:polygon draw:style-name="gr5" draw:text-style-name="P6" draw:layer="layout" svg:width="0.017cm" svg:height="1.041cm" svg:x="2.341cm" svg:y="22.368cm" svg:viewBox="0 0 18 1042" draw:points="0,0 18,0 18,1042 0,1042">
          <text:p/>
        </draw:polygon>
        <draw:polygon draw:style-name="gr5" draw:text-style-name="P6" draw:layer="layout" svg:width="0.017cm" svg:height="1.041cm" svg:x="3.781cm" svg:y="22.368cm" svg:viewBox="0 0 18 1042" draw:points="0,0 18,0 18,1042 0,1042">
          <text:p/>
        </draw:polygon>
        <draw:polygon draw:style-name="gr5" draw:text-style-name="P6" draw:layer="layout" svg:width="0.016cm" svg:height="1.041cm" svg:x="10.784cm" svg:y="22.368cm" svg:viewBox="0 0 17 1042" draw:points="0,0 17,0 17,1042 0,1042">
          <text:p/>
        </draw:polygon>
        <draw:polygon draw:style-name="gr5" draw:text-style-name="P6" draw:layer="layout" svg:width="0.017cm" svg:height="1.041cm" svg:x="16.788cm" svg:y="22.368cm" svg:viewBox="0 0 18 1042" draw:points="0,0 18,0 18,1042 0,1042">
          <text:p/>
        </draw:polygon>
        <draw:polygon draw:style-name="gr5" draw:text-style-name="P6" draw:layer="layout" svg:width="0.017cm" svg:height="1.041cm" svg:x="19.235cm" svg:y="22.368cm" svg:viewBox="0 0 18 1042" draw:points="0,0 18,0 18,1042 0,1042">
          <text:p/>
        </draw:polygon>
        <draw:frame draw:style-name="gr4" draw:text-style-name="P5" draw:layer="layout" svg:width="0.35cm" svg:height="0.39cm" svg:x="16.988cm" svg:y="22.38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cm" svg:height="0.39cm" svg:x="2.541cm" svg:y="23.444cm">
          <draw:text-box>
            <text:p text:style-name="P1"><text:span text:style-name="T6">8 </text:span></text:p>
          </draw:text-box>
        </draw:frame>
        <draw:frame draw:style-name="gr4" draw:text-style-name="P5" draw:layer="layout" svg:width="2.744cm" svg:height="0.39cm" svg:x="3.98cm" svg:y="23.444cm">
          <draw:text-box>
            <text:p text:style-name="P1"><text:span text:style-name="T6">Copy of Academic </text:span></text:p>
          </draw:text-box>
        </draw:frame>
        <draw:frame draw:style-name="gr4" draw:text-style-name="P5" draw:layer="layout" svg:width="6.277cm" svg:height="0.39cm" svg:x="3.98cm" svg:y="23.846cm">
          <draw:text-box>
            <text:p text:style-name="P1"><text:span text:style-name="T6">Certificates/Transcripts/Result Slips-KCPE, </text:span></text:p>
          </draw:text-box>
        </draw:frame>
        <draw:frame draw:style-name="gr4" draw:text-style-name="P5" draw:layer="layout" svg:width="6.442cm" svg:height="0.39cm" svg:x="3.98cm" svg:y="24.252cm">
          <draw:text-box>
            <text:p text:style-name="P1"><text:span text:style-name="T6">KCSE, Diploma, Undergraduate, Masters etc </text:span></text:p>
          </draw:text-box>
        </draw:frame>
        <draw:frame draw:style-name="gr4" draw:text-style-name="P5" draw:layer="layout" svg:width="0.35cm" svg:height="0.39cm" svg:x="10.983cm" svg:y="23.444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0.017cm" svg:height="0.017cm" svg:x="2.341cm" svg:y="23.409cm" svg:viewBox="0 0 18 18" draw:points="0,0 18,0 18,18 0,18">
          <text:p/>
        </draw:polygon>
        <draw:polygon draw:style-name="gr5" draw:text-style-name="P6" draw:layer="layout" svg:width="1.423cm" svg:height="0.017cm" svg:x="2.358cm" svg:y="23.409cm" svg:viewBox="0 0 1424 18" draw:points="0,0 1424,0 1424,18 0,18">
          <text:p/>
        </draw:polygon>
        <draw:polygon draw:style-name="gr5" draw:text-style-name="P6" draw:layer="layout" svg:width="0.017cm" svg:height="0.017cm" svg:x="3.781cm" svg:y="23.409cm" svg:viewBox="0 0 18 18" draw:points="0,0 18,0 18,18 0,18">
          <text:p/>
        </draw:polygon>
        <draw:polygon draw:style-name="gr5" draw:text-style-name="P6" draw:layer="layout" svg:width="6.985cm" svg:height="0.017cm" svg:x="3.798cm" svg:y="23.409cm" svg:viewBox="0 0 6986 18" draw:points="0,0 6986,0 6986,18 0,18">
          <text:p/>
        </draw:polygon>
        <draw:polygon draw:style-name="gr5" draw:text-style-name="P6" draw:layer="layout" svg:width="0.016cm" svg:height="0.017cm" svg:x="10.784cm" svg:y="23.409cm" svg:viewBox="0 0 17 18" draw:points="0,0 17,0 17,18 0,18">
          <text:p/>
        </draw:polygon>
        <draw:polygon draw:style-name="gr5" draw:text-style-name="P6" draw:layer="layout" svg:width="5.988cm" svg:height="0.017cm" svg:x="10.8cm" svg:y="23.409cm" svg:viewBox="0 0 5989 18" draw:points="0,0 5989,0 5989,18 0,18">
          <text:p/>
        </draw:polygon>
        <draw:polygon draw:style-name="gr5" draw:text-style-name="P6" draw:layer="layout" svg:width="0.017cm" svg:height="0.017cm" svg:x="16.788cm" svg:y="23.409cm" svg:viewBox="0 0 18 18" draw:points="0,0 18,0 18,18 0,18">
          <text:p/>
        </draw:polygon>
        <draw:polygon draw:style-name="gr5" draw:text-style-name="P6" draw:layer="layout" svg:width="2.43cm" svg:height="0.017cm" svg:x="16.805cm" svg:y="23.409cm" svg:viewBox="0 0 2431 18" draw:points="0,0 2431,0 2431,18 0,18">
          <text:p/>
        </draw:polygon>
        <draw:polygon draw:style-name="gr5" draw:text-style-name="P6" draw:layer="layout" svg:width="0.017cm" svg:height="0.017cm" svg:x="19.235cm" svg:y="23.409cm" svg:viewBox="0 0 18 18" draw:points="0,0 18,0 18,18 0,18">
          <text:p/>
        </draw:polygon>
        <draw:polygon draw:style-name="gr5" draw:text-style-name="P6" draw:layer="layout" svg:width="0.017cm" svg:height="1.215cm" svg:x="2.341cm" svg:y="23.426cm" svg:viewBox="0 0 18 1216" draw:points="0,0 18,0 18,1216 0,1216">
          <text:p/>
        </draw:polygon>
        <draw:polygon draw:style-name="gr5" draw:text-style-name="P6" draw:layer="layout" svg:width="0.017cm" svg:height="0.017cm" svg:x="2.341cm" svg:y="24.641cm" svg:viewBox="0 0 18 18" draw:points="0,0 18,0 18,18 0,18">
          <text:p/>
        </draw:polygon>
        <draw:polygon draw:style-name="gr5" draw:text-style-name="P6" draw:layer="layout" svg:width="0.017cm" svg:height="0.017cm" svg:x="2.341cm" svg:y="24.641cm" svg:viewBox="0 0 18 18" draw:points="0,0 18,0 18,18 0,18">
          <text:p/>
        </draw:polygon>
        <draw:polygon draw:style-name="gr5" draw:text-style-name="P6" draw:layer="layout" svg:width="1.423cm" svg:height="0.017cm" svg:x="2.358cm" svg:y="24.641cm" svg:viewBox="0 0 1424 18" draw:points="0,0 1424,0 1424,18 0,18">
          <text:p/>
        </draw:polygon>
        <draw:polygon draw:style-name="gr5" draw:text-style-name="P6" draw:layer="layout" svg:width="0.017cm" svg:height="1.215cm" svg:x="3.781cm" svg:y="23.426cm" svg:viewBox="0 0 18 1216" draw:points="0,0 18,0 18,1216 0,1216">
          <text:p/>
        </draw:polygon>
        <draw:polygon draw:style-name="gr5" draw:text-style-name="P6" draw:layer="layout" svg:width="0.017cm" svg:height="0.017cm" svg:x="3.781cm" svg:y="24.641cm" svg:viewBox="0 0 18 18" draw:points="0,0 18,0 18,18 0,18">
          <text:p/>
        </draw:polygon>
        <draw:polygon draw:style-name="gr5" draw:text-style-name="P6" draw:layer="layout" svg:width="6.985cm" svg:height="0.017cm" svg:x="3.798cm" svg:y="24.641cm" svg:viewBox="0 0 6986 18" draw:points="0,0 6986,0 6986,18 0,18">
          <text:p/>
        </draw:polygon>
        <draw:polygon draw:style-name="gr5" draw:text-style-name="P6" draw:layer="layout" svg:width="0.016cm" svg:height="1.215cm" svg:x="10.784cm" svg:y="23.426cm" svg:viewBox="0 0 17 1216" draw:points="0,0 17,0 17,1216 0,1216">
          <text:p/>
        </draw:polygon>
        <draw:polygon draw:style-name="gr5" draw:text-style-name="P6" draw:layer="layout" svg:width="0.016cm" svg:height="0.017cm" svg:x="10.784cm" svg:y="24.641cm" svg:viewBox="0 0 17 18" draw:points="0,0 17,0 17,18 0,18">
          <text:p/>
        </draw:polygon>
        <draw:polygon draw:style-name="gr5" draw:text-style-name="P6" draw:layer="layout" svg:width="5.988cm" svg:height="0.017cm" svg:x="10.8cm" svg:y="24.641cm" svg:viewBox="0 0 5989 18" draw:points="0,0 5989,0 5989,18 0,18">
          <text:p/>
        </draw:polygon>
        <draw:polygon draw:style-name="gr5" draw:text-style-name="P6" draw:layer="layout" svg:width="0.017cm" svg:height="1.215cm" svg:x="16.788cm" svg:y="23.426cm" svg:viewBox="0 0 18 1216" draw:points="0,0 18,0 18,1216 0,1216">
          <text:p/>
        </draw:polygon>
        <draw:polygon draw:style-name="gr5" draw:text-style-name="P6" draw:layer="layout" svg:width="0.017cm" svg:height="0.017cm" svg:x="16.788cm" svg:y="24.641cm" svg:viewBox="0 0 18 18" draw:points="0,0 18,0 18,18 0,18">
          <text:p/>
        </draw:polygon>
        <draw:polygon draw:style-name="gr5" draw:text-style-name="P6" draw:layer="layout" svg:width="2.43cm" svg:height="0.017cm" svg:x="16.805cm" svg:y="24.641cm" svg:viewBox="0 0 2431 18" draw:points="0,0 2431,0 2431,18 0,18">
          <text:p/>
        </draw:polygon>
        <draw:polygon draw:style-name="gr5" draw:text-style-name="P6" draw:layer="layout" svg:width="0.017cm" svg:height="1.215cm" svg:x="19.235cm" svg:y="23.426cm" svg:viewBox="0 0 18 1216" draw:points="0,0 18,0 18,1216 0,1216">
          <text:p/>
        </draw:polygon>
        <draw:polygon draw:style-name="gr5" draw:text-style-name="P6" draw:layer="layout" svg:width="0.017cm" svg:height="0.017cm" svg:x="19.235cm" svg:y="24.641cm" svg:viewBox="0 0 18 18" draw:points="0,0 18,0 18,18 0,18">
          <text:p/>
        </draw:polygon>
        <draw:polygon draw:style-name="gr5" draw:text-style-name="P6" draw:layer="layout" svg:width="0.017cm" svg:height="0.017cm" svg:x="19.235cm" svg:y="24.641cm" svg:viewBox="0 0 18 18" draw:points="0,0 18,0 18,18 0,18">
          <text:p/>
        </draw:polygon>
        <draw:frame draw:style-name="gr4" draw:text-style-name="P5" draw:layer="layout" svg:width="0.35cm" svg:height="0.39cm" svg:x="16.988cm" svg:y="23.44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2.54cm" svg:height="2.222cm" svg:x="9.602cm" svg:y="1.2cm">
          <draw:image xlink:href="Pictures/100000010000030400000300C44F8E6E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1" draw:text-style-name="P2" draw:layer="layout" svg:width="0.388cm" svg:height="0.48cm" svg:x="2.541cm" svg:y="1.26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614cm" svg:height="0.105cm" svg:x="2.49cm" svg:y="25.344cm" svg:viewBox="0 0 16615 106" draw:points="0,0 16615,0 16615,106 0,106">
          <text:p/>
        </draw:polygon>
        <draw:polygon draw:style-name="gr2" draw:text-style-name="P3" draw:layer="layout" svg:width="16.614cm" svg:height="0.025cm" svg:x="2.49cm" svg:y="25.475cm" svg:viewBox="0 0 16615 26" draw:points="0,0 16615,0 16615,26 0,26">
          <text:p/>
        </draw:polygon>
        <draw:frame draw:style-name="gr3" draw:text-style-name="P4" draw:layer="layout" svg:width="4.473cm" svg:height="0.353cm" svg:x="8.519cm" svg:y="25.548cm">
          <draw:text-box>
            <text:p text:style-name="P1"><text:span text:style-name="T2">wamut is ISO 9001:2015 Certified </text:span></text:p>
          </draw:text-box>
        </draw:frame>
        <draw:frame draw:style-name="gr3" draw:text-style-name="P4" draw:layer="layout" svg:width="10.814cm" svg:height="0.353cm" svg:x="2.541cm" svg:y="25.916cm">
          <draw:text-box>
            <text:p text:style-name="P1"><text:span text:style-name="T2"><text:s text:c="73"/>Empowering society through technolog</text:span></text:p>
          </draw:text-box>
        </draw:frame>
        <draw:frame draw:style-name="gr4" draw:text-style-name="P5" draw:layer="layout" svg:width="0.353cm" svg:height="0.39cm" svg:x="2.541cm" svg:y="2.202cm">
          <draw:text-box>
            <text:p text:style-name="P1"><text:span text:style-name="T6">9. </text:span></text:p>
          </draw:text-box>
        </draw:frame>
        <draw:frame draw:style-name="gr4" draw:text-style-name="P5" draw:layer="layout" svg:width="6.676cm" svg:height="0.39cm" svg:x="3.98cm" svg:y="2.202cm">
          <draw:text-box>
            <text:p text:style-name="P1"><text:span text:style-name="T6">Copy of Secondary School Leaving Certificate </text:span></text:p>
          </draw:text-box>
        </draw:frame>
        <draw:frame draw:style-name="gr4" draw:text-style-name="P5" draw:layer="layout" svg:width="0.35cm" svg:height="0.39cm" svg:x="10.983cm" svg:y="2.202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0.017cm" svg:height="0.018cm" svg:x="2.341cm" svg:y="2.167cm" svg:viewBox="0 0 18 19" draw:points="0,0 18,0 18,19 0,19">
          <text:p/>
        </draw:polygon>
        <draw:polygon draw:style-name="gr5" draw:text-style-name="P6" draw:layer="layout" svg:width="0.017cm" svg:height="0.018cm" svg:x="2.341cm" svg:y="2.167cm" svg:viewBox="0 0 18 19" draw:points="0,0 18,0 18,19 0,19">
          <text:p/>
        </draw:polygon>
        <draw:polygon draw:style-name="gr5" draw:text-style-name="P6" draw:layer="layout" svg:width="1.423cm" svg:height="0.018cm" svg:x="2.358cm" svg:y="2.167cm" svg:viewBox="0 0 1424 19" draw:points="0,0 1424,0 1424,19 0,19">
          <text:p/>
        </draw:polygon>
        <draw:polygon draw:style-name="gr5" draw:text-style-name="P6" draw:layer="layout" svg:width="0.017cm" svg:height="0.018cm" svg:x="3.781cm" svg:y="2.167cm" svg:viewBox="0 0 18 19" draw:points="0,0 18,0 18,19 0,19">
          <text:p/>
        </draw:polygon>
        <draw:polygon draw:style-name="gr5" draw:text-style-name="P6" draw:layer="layout" svg:width="6.985cm" svg:height="0.018cm" svg:x="3.798cm" svg:y="2.167cm" svg:viewBox="0 0 6986 19" draw:points="0,0 6986,0 6986,19 0,19">
          <text:p/>
        </draw:polygon>
        <draw:polygon draw:style-name="gr5" draw:text-style-name="P6" draw:layer="layout" svg:width="0.016cm" svg:height="0.018cm" svg:x="10.784cm" svg:y="2.167cm" svg:viewBox="0 0 17 19" draw:points="0,0 17,0 17,19 0,19">
          <text:p/>
        </draw:polygon>
        <draw:polygon draw:style-name="gr5" draw:text-style-name="P6" draw:layer="layout" svg:width="5.988cm" svg:height="0.018cm" svg:x="10.8cm" svg:y="2.167cm" svg:viewBox="0 0 5989 19" draw:points="0,0 5989,0 5989,19 0,19">
          <text:p/>
        </draw:polygon>
        <draw:polygon draw:style-name="gr5" draw:text-style-name="P6" draw:layer="layout" svg:width="0.017cm" svg:height="0.018cm" svg:x="16.788cm" svg:y="2.167cm" svg:viewBox="0 0 18 19" draw:points="0,0 18,0 18,19 0,19">
          <text:p/>
        </draw:polygon>
        <draw:polygon draw:style-name="gr5" draw:text-style-name="P6" draw:layer="layout" svg:width="2.43cm" svg:height="0.018cm" svg:x="16.805cm" svg:y="2.167cm" svg:viewBox="0 0 2431 19" draw:points="0,0 2431,0 2431,19 0,19">
          <text:p/>
        </draw:polygon>
        <draw:polygon draw:style-name="gr5" draw:text-style-name="P6" draw:layer="layout" svg:width="0.017cm" svg:height="0.018cm" svg:x="19.235cm" svg:y="2.167cm" svg:viewBox="0 0 18 19" draw:points="0,0 18,0 18,19 0,19">
          <text:p/>
        </draw:polygon>
        <draw:polygon draw:style-name="gr5" draw:text-style-name="P6" draw:layer="layout" svg:width="0.017cm" svg:height="0.018cm" svg:x="19.235cm" svg:y="2.167cm" svg:viewBox="0 0 18 19" draw:points="0,0 18,0 18,19 0,19">
          <text:p/>
        </draw:polygon>
        <draw:polygon draw:style-name="gr5" draw:text-style-name="P6" draw:layer="layout" svg:width="0.017cm" svg:height="1.042cm" svg:x="2.341cm" svg:y="2.184cm" svg:viewBox="0 0 18 1043" draw:points="0,0 18,0 18,1043 0,1043">
          <text:p/>
        </draw:polygon>
        <draw:polygon draw:style-name="gr5" draw:text-style-name="P6" draw:layer="layout" svg:width="0.017cm" svg:height="1.042cm" svg:x="3.781cm" svg:y="2.184cm" svg:viewBox="0 0 18 1043" draw:points="0,0 18,0 18,1043 0,1043">
          <text:p/>
        </draw:polygon>
        <draw:polygon draw:style-name="gr5" draw:text-style-name="P6" draw:layer="layout" svg:width="0.016cm" svg:height="1.042cm" svg:x="10.784cm" svg:y="2.184cm" svg:viewBox="0 0 17 1043" draw:points="0,0 17,0 17,1043 0,1043">
          <text:p/>
        </draw:polygon>
        <draw:polygon draw:style-name="gr5" draw:text-style-name="P6" draw:layer="layout" svg:width="0.017cm" svg:height="1.042cm" svg:x="16.788cm" svg:y="2.184cm" svg:viewBox="0 0 18 1043" draw:points="0,0 18,0 18,1043 0,1043">
          <text:p/>
        </draw:polygon>
        <draw:polygon draw:style-name="gr5" draw:text-style-name="P6" draw:layer="layout" svg:width="0.017cm" svg:height="1.042cm" svg:x="19.235cm" svg:y="2.184cm" svg:viewBox="0 0 18 1043" draw:points="0,0 18,0 18,1043 0,1043">
          <text:p/>
        </draw:polygon>
        <draw:frame draw:style-name="gr4" draw:text-style-name="P5" draw:layer="layout" svg:width="0.35cm" svg:height="0.39cm" svg:x="16.988cm" svg:y="2.20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529cm" svg:height="0.39cm" svg:x="2.541cm" svg:y="3.261cm">
          <draw:text-box>
            <text:p text:style-name="P1"><text:span text:style-name="T6">10. </text:span></text:p>
          </draw:text-box>
        </draw:frame>
        <draw:frame draw:style-name="gr4" draw:text-style-name="P5" draw:layer="layout" svg:width="5.565cm" svg:height="0.39cm" svg:x="3.98cm" svg:y="3.261cm">
          <draw:text-box>
            <text:p text:style-name="P1"><text:span text:style-name="T6">Copy of Printed Personal Details Form </text:span></text:p>
          </draw:text-box>
        </draw:frame>
        <draw:frame draw:style-name="gr4" draw:text-style-name="P5" draw:layer="layout" svg:width="6.178cm" svg:height="0.39cm" svg:x="3.98cm" svg:y="3.667cm">
          <draw:text-box>
            <text:p text:style-name="P1"><text:span text:style-name="T6">obtained after Online Registration Exercise </text:span></text:p>
          </draw:text-box>
        </draw:frame>
        <draw:frame draw:style-name="gr4" draw:text-style-name="P5" draw:layer="layout" svg:width="5.707cm" svg:height="0.39cm" svg:x="10.983cm" svg:y="3.261cm">
          <draw:text-box>
            <text:p text:style-name="P1"><text:span text:style-name="T6">WaMUT</text:span><text:span text:style-name="T6">/AAR/APK &amp; APS/FORM 3/5 </text:span></text:p>
          </draw:text-box>
        </draw:frame>
        <draw:polygon draw:style-name="gr5" draw:text-style-name="P6" draw:layer="layout" svg:width="0.017cm" svg:height="0.017cm" svg:x="2.341cm" svg:y="3.226cm" svg:viewBox="0 0 18 18" draw:points="0,0 18,0 18,18 0,18">
          <text:p/>
        </draw:polygon>
        <draw:polygon draw:style-name="gr5" draw:text-style-name="P6" draw:layer="layout" svg:width="1.423cm" svg:height="0.017cm" svg:x="2.358cm" svg:y="3.226cm" svg:viewBox="0 0 1424 18" draw:points="0,0 1424,0 1424,18 0,18">
          <text:p/>
        </draw:polygon>
        <draw:polygon draw:style-name="gr5" draw:text-style-name="P6" draw:layer="layout" svg:width="0.017cm" svg:height="0.017cm" svg:x="3.781cm" svg:y="3.226cm" svg:viewBox="0 0 18 18" draw:points="0,0 18,0 18,18 0,18">
          <text:p/>
        </draw:polygon>
        <draw:polygon draw:style-name="gr5" draw:text-style-name="P6" draw:layer="layout" svg:width="6.985cm" svg:height="0.017cm" svg:x="3.798cm" svg:y="3.226cm" svg:viewBox="0 0 6986 18" draw:points="0,0 6986,0 6986,18 0,18">
          <text:p/>
        </draw:polygon>
        <draw:polygon draw:style-name="gr5" draw:text-style-name="P6" draw:layer="layout" svg:width="0.016cm" svg:height="0.017cm" svg:x="10.784cm" svg:y="3.226cm" svg:viewBox="0 0 17 18" draw:points="0,0 17,0 17,18 0,18">
          <text:p/>
        </draw:polygon>
        <draw:polygon draw:style-name="gr5" draw:text-style-name="P6" draw:layer="layout" svg:width="5.988cm" svg:height="0.017cm" svg:x="10.8cm" svg:y="3.226cm" svg:viewBox="0 0 5989 18" draw:points="0,0 5989,0 5989,18 0,18">
          <text:p/>
        </draw:polygon>
        <draw:polygon draw:style-name="gr5" draw:text-style-name="P6" draw:layer="layout" svg:width="0.017cm" svg:height="0.017cm" svg:x="16.788cm" svg:y="3.226cm" svg:viewBox="0 0 18 18" draw:points="0,0 18,0 18,18 0,18">
          <text:p/>
        </draw:polygon>
        <draw:polygon draw:style-name="gr5" draw:text-style-name="P6" draw:layer="layout" svg:width="2.43cm" svg:height="0.017cm" svg:x="16.805cm" svg:y="3.226cm" svg:viewBox="0 0 2431 18" draw:points="0,0 2431,0 2431,18 0,18">
          <text:p/>
        </draw:polygon>
        <draw:polygon draw:style-name="gr5" draw:text-style-name="P6" draw:layer="layout" svg:width="0.017cm" svg:height="0.017cm" svg:x="19.235cm" svg:y="3.226cm" svg:viewBox="0 0 18 18" draw:points="0,0 18,0 18,18 0,18">
          <text:p/>
        </draw:polygon>
        <draw:polygon draw:style-name="gr5" draw:text-style-name="P6" draw:layer="layout" svg:width="0.017cm" svg:height="1.041cm" svg:x="2.341cm" svg:y="3.243cm" svg:viewBox="0 0 18 1042" draw:points="0,0 18,0 18,1042 0,1042">
          <text:p/>
        </draw:polygon>
        <draw:polygon draw:style-name="gr5" draw:text-style-name="P6" draw:layer="layout" svg:width="0.017cm" svg:height="1.041cm" svg:x="3.781cm" svg:y="3.243cm" svg:viewBox="0 0 18 1042" draw:points="0,0 18,0 18,1042 0,1042">
          <text:p/>
        </draw:polygon>
        <draw:polygon draw:style-name="gr5" draw:text-style-name="P6" draw:layer="layout" svg:width="0.016cm" svg:height="1.041cm" svg:x="10.784cm" svg:y="3.243cm" svg:viewBox="0 0 17 1042" draw:points="0,0 17,0 17,1042 0,1042">
          <text:p/>
        </draw:polygon>
        <draw:polygon draw:style-name="gr5" draw:text-style-name="P6" draw:layer="layout" svg:width="0.017cm" svg:height="1.041cm" svg:x="16.788cm" svg:y="3.243cm" svg:viewBox="0 0 18 1042" draw:points="0,0 18,0 18,1042 0,1042">
          <text:p/>
        </draw:polygon>
        <draw:polygon draw:style-name="gr5" draw:text-style-name="P6" draw:layer="layout" svg:width="0.017cm" svg:height="1.041cm" svg:x="19.235cm" svg:y="3.243cm" svg:viewBox="0 0 18 1042" draw:points="0,0 18,0 18,1042 0,1042">
          <text:p/>
        </draw:polygon>
        <draw:frame draw:style-name="gr4" draw:text-style-name="P5" draw:layer="layout" svg:width="0.35cm" svg:height="0.39cm" svg:x="16.988cm" svg:y="3.26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41cm" svg:height="0.39cm" svg:x="2.541cm" svg:y="4.319cm">
          <draw:text-box>
            <text:p text:style-name="P1"><text:span text:style-name="T6">11 </text:span></text:p>
          </draw:text-box>
        </draw:frame>
        <draw:frame draw:style-name="gr4" draw:text-style-name="P5" draw:layer="layout" svg:width="5.807cm" svg:height="0.39cm" svg:x="3.98cm" svg:y="4.319cm">
          <draw:text-box>
            <text:p text:style-name="P1"><text:span text:style-name="T6">Medical Examination Report (attach one </text:span></text:p>
          </draw:text-box>
        </draw:frame>
        <draw:frame draw:style-name="gr4" draw:text-style-name="P5" draw:layer="layout" svg:width="6.12cm" svg:height="0.39cm" svg:x="3.98cm" svg:y="4.725cm">
          <draw:text-box>
            <text:p text:style-name="P1"><text:span text:style-name="T6">official coloured passport size photograph) </text:span></text:p>
          </draw:text-box>
        </draw:frame>
        <draw:frame draw:style-name="gr4" draw:text-style-name="P5" draw:layer="layout" svg:width="5.619cm" svg:height="0.39cm" svg:x="10.983cm" svg:y="4.319cm">
          <draw:text-box>
            <text:p text:style-name="P1"><text:span text:style-name="T6">WaMUT</text:span><text:span text:style-name="T6">/AAR/APK&amp; APS/FORM 4/5 </text:span></text:p>
          </draw:text-box>
        </draw:frame>
        <draw:polygon draw:style-name="gr5" draw:text-style-name="P6" draw:layer="layout" svg:width="0.017cm" svg:height="0.017cm" svg:x="2.341cm" svg:y="4.284cm" svg:viewBox="0 0 18 18" draw:points="0,0 18,0 18,18 0,18">
          <text:p/>
        </draw:polygon>
        <draw:polygon draw:style-name="gr5" draw:text-style-name="P6" draw:layer="layout" svg:width="1.423cm" svg:height="0.017cm" svg:x="2.358cm" svg:y="4.284cm" svg:viewBox="0 0 1424 18" draw:points="0,0 1424,0 1424,18 0,18">
          <text:p/>
        </draw:polygon>
        <draw:polygon draw:style-name="gr5" draw:text-style-name="P6" draw:layer="layout" svg:width="0.017cm" svg:height="0.017cm" svg:x="3.781cm" svg:y="4.284cm" svg:viewBox="0 0 18 18" draw:points="0,0 18,0 18,18 0,18">
          <text:p/>
        </draw:polygon>
        <draw:polygon draw:style-name="gr5" draw:text-style-name="P6" draw:layer="layout" svg:width="6.985cm" svg:height="0.017cm" svg:x="3.798cm" svg:y="4.284cm" svg:viewBox="0 0 6986 18" draw:points="0,0 6986,0 6986,18 0,18">
          <text:p/>
        </draw:polygon>
        <draw:polygon draw:style-name="gr5" draw:text-style-name="P6" draw:layer="layout" svg:width="0.016cm" svg:height="0.017cm" svg:x="10.784cm" svg:y="4.284cm" svg:viewBox="0 0 17 18" draw:points="0,0 17,0 17,18 0,18">
          <text:p/>
        </draw:polygon>
        <draw:polygon draw:style-name="gr5" draw:text-style-name="P6" draw:layer="layout" svg:width="5.988cm" svg:height="0.017cm" svg:x="10.8cm" svg:y="4.284cm" svg:viewBox="0 0 5989 18" draw:points="0,0 5989,0 5989,18 0,18">
          <text:p/>
        </draw:polygon>
        <draw:polygon draw:style-name="gr5" draw:text-style-name="P6" draw:layer="layout" svg:width="0.017cm" svg:height="0.017cm" svg:x="16.788cm" svg:y="4.284cm" svg:viewBox="0 0 18 18" draw:points="0,0 18,0 18,18 0,18">
          <text:p/>
        </draw:polygon>
        <draw:polygon draw:style-name="gr5" draw:text-style-name="P6" draw:layer="layout" svg:width="2.43cm" svg:height="0.017cm" svg:x="16.805cm" svg:y="4.284cm" svg:viewBox="0 0 2431 18" draw:points="0,0 2431,0 2431,18 0,18">
          <text:p/>
        </draw:polygon>
        <draw:polygon draw:style-name="gr5" draw:text-style-name="P6" draw:layer="layout" svg:width="0.017cm" svg:height="0.017cm" svg:x="19.235cm" svg:y="4.284cm" svg:viewBox="0 0 18 18" draw:points="0,0 18,0 18,18 0,18">
          <text:p/>
        </draw:polygon>
        <draw:polygon draw:style-name="gr5" draw:text-style-name="P6" draw:layer="layout" svg:width="0.017cm" svg:height="0.813cm" svg:x="2.341cm" svg:y="4.301cm" svg:viewBox="0 0 18 814" draw:points="0,0 18,0 18,814 0,814">
          <text:p/>
        </draw:polygon>
        <draw:polygon draw:style-name="gr5" draw:text-style-name="P6" draw:layer="layout" svg:width="0.017cm" svg:height="0.813cm" svg:x="3.781cm" svg:y="4.301cm" svg:viewBox="0 0 18 814" draw:points="0,0 18,0 18,814 0,814">
          <text:p/>
        </draw:polygon>
        <draw:polygon draw:style-name="gr5" draw:text-style-name="P6" draw:layer="layout" svg:width="0.016cm" svg:height="0.813cm" svg:x="10.784cm" svg:y="4.301cm" svg:viewBox="0 0 17 814" draw:points="0,0 17,0 17,814 0,814">
          <text:p/>
        </draw:polygon>
        <draw:polygon draw:style-name="gr5" draw:text-style-name="P6" draw:layer="layout" svg:width="0.017cm" svg:height="0.813cm" svg:x="16.788cm" svg:y="4.301cm" svg:viewBox="0 0 18 814" draw:points="0,0 18,0 18,814 0,814">
          <text:p/>
        </draw:polygon>
        <draw:polygon draw:style-name="gr5" draw:text-style-name="P6" draw:layer="layout" svg:width="0.017cm" svg:height="0.813cm" svg:x="19.235cm" svg:y="4.301cm" svg:viewBox="0 0 18 814" draw:points="0,0 18,0 18,814 0,814">
          <text:p/>
        </draw:polygon>
        <draw:frame draw:style-name="gr4" draw:text-style-name="P5" draw:layer="layout" svg:width="0.35cm" svg:height="0.39cm" svg:x="16.988cm" svg:y="4.31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41cm" svg:height="0.39cm" svg:x="2.541cm" svg:y="5.149cm">
          <draw:text-box>
            <text:p text:style-name="P1"><text:span text:style-name="T6">12 </text:span></text:p>
          </draw:text-box>
        </draw:frame>
        <draw:frame draw:style-name="gr4" draw:text-style-name="P5" draw:layer="layout" svg:width="5.682cm" svg:height="0.39cm" svg:x="3.98cm" svg:y="5.149cm">
          <draw:text-box>
            <text:p text:style-name="P1"><text:span text:style-name="T9">A Duly Signed copy of Students’ Code. </text:span></text:p>
          </draw:text-box>
        </draw:frame>
        <draw:frame draw:style-name="gr4" draw:text-style-name="P5" draw:layer="layout" svg:width="5.722cm" svg:height="0.39cm" svg:x="10.983cm" svg:y="5.149cm">
          <draw:text-box>
            <text:p text:style-name="P1"><text:span text:style-name="T6">WaMUT/AAR/APK &amp; APS/FORM 5/5 </text:span></text:p>
          </draw:text-box>
        </draw:frame>
        <draw:polygon draw:style-name="gr5" draw:text-style-name="P6" draw:layer="layout" svg:width="0.017cm" svg:height="0.017cm" svg:x="2.341cm" svg:y="5.114cm" svg:viewBox="0 0 18 18" draw:points="0,0 18,0 18,18 0,18">
          <text:p/>
        </draw:polygon>
        <draw:polygon draw:style-name="gr5" draw:text-style-name="P6" draw:layer="layout" svg:width="1.423cm" svg:height="0.017cm" svg:x="2.358cm" svg:y="5.114cm" svg:viewBox="0 0 1424 18" draw:points="0,0 1424,0 1424,18 0,18">
          <text:p/>
        </draw:polygon>
        <draw:polygon draw:style-name="gr5" draw:text-style-name="P6" draw:layer="layout" svg:width="0.017cm" svg:height="0.017cm" svg:x="3.781cm" svg:y="5.114cm" svg:viewBox="0 0 18 18" draw:points="0,0 18,0 18,18 0,18">
          <text:p/>
        </draw:polygon>
        <draw:polygon draw:style-name="gr5" draw:text-style-name="P6" draw:layer="layout" svg:width="6.985cm" svg:height="0.017cm" svg:x="3.798cm" svg:y="5.114cm" svg:viewBox="0 0 6986 18" draw:points="0,0 6986,0 6986,18 0,18">
          <text:p/>
        </draw:polygon>
        <draw:polygon draw:style-name="gr5" draw:text-style-name="P6" draw:layer="layout" svg:width="0.016cm" svg:height="0.017cm" svg:x="10.784cm" svg:y="5.114cm" svg:viewBox="0 0 17 18" draw:points="0,0 17,0 17,18 0,18">
          <text:p/>
        </draw:polygon>
        <draw:polygon draw:style-name="gr5" draw:text-style-name="P6" draw:layer="layout" svg:width="5.988cm" svg:height="0.017cm" svg:x="10.8cm" svg:y="5.114cm" svg:viewBox="0 0 5989 18" draw:points="0,0 5989,0 5989,18 0,18">
          <text:p/>
        </draw:polygon>
        <draw:polygon draw:style-name="gr5" draw:text-style-name="P6" draw:layer="layout" svg:width="0.017cm" svg:height="0.017cm" svg:x="16.788cm" svg:y="5.114cm" svg:viewBox="0 0 18 18" draw:points="0,0 18,0 18,18 0,18">
          <text:p/>
        </draw:polygon>
        <draw:polygon draw:style-name="gr5" draw:text-style-name="P6" draw:layer="layout" svg:width="2.43cm" svg:height="0.017cm" svg:x="16.805cm" svg:y="5.114cm" svg:viewBox="0 0 2431 18" draw:points="0,0 2431,0 2431,18 0,18">
          <text:p/>
        </draw:polygon>
        <draw:polygon draw:style-name="gr5" draw:text-style-name="P6" draw:layer="layout" svg:width="0.017cm" svg:height="0.017cm" svg:x="19.235cm" svg:y="5.114cm" svg:viewBox="0 0 18 18" draw:points="0,0 18,0 18,18 0,18">
          <text:p/>
        </draw:polygon>
        <draw:polygon draw:style-name="gr5" draw:text-style-name="P6" draw:layer="layout" svg:width="0.017cm" svg:height="1.008cm" svg:x="2.341cm" svg:y="5.131cm" svg:viewBox="0 0 18 1009" draw:points="0,0 18,0 18,1009 0,1009">
          <text:p/>
        </draw:polygon>
        <draw:polygon draw:style-name="gr5" draw:text-style-name="P6" draw:layer="layout" svg:width="0.017cm" svg:height="0.016cm" svg:x="2.341cm" svg:y="6.139cm" svg:viewBox="0 0 18 17" draw:points="0,0 18,0 18,17 0,17">
          <text:p/>
        </draw:polygon>
        <draw:polygon draw:style-name="gr5" draw:text-style-name="P6" draw:layer="layout" svg:width="0.017cm" svg:height="0.016cm" svg:x="2.341cm" svg:y="6.139cm" svg:viewBox="0 0 18 17" draw:points="0,0 18,0 18,17 0,17">
          <text:p/>
        </draw:polygon>
        <draw:polygon draw:style-name="gr5" draw:text-style-name="P6" draw:layer="layout" svg:width="1.423cm" svg:height="0.016cm" svg:x="2.358cm" svg:y="6.139cm" svg:viewBox="0 0 1424 17" draw:points="0,0 1424,0 1424,17 0,17">
          <text:p/>
        </draw:polygon>
        <draw:polygon draw:style-name="gr5" draw:text-style-name="P6" draw:layer="layout" svg:width="0.017cm" svg:height="1.008cm" svg:x="3.781cm" svg:y="5.131cm" svg:viewBox="0 0 18 1009" draw:points="0,0 18,0 18,1009 0,1009">
          <text:p/>
        </draw:polygon>
        <draw:polygon draw:style-name="gr5" draw:text-style-name="P6" draw:layer="layout" svg:width="0.017cm" svg:height="0.016cm" svg:x="3.781cm" svg:y="6.139cm" svg:viewBox="0 0 18 17" draw:points="0,0 18,0 18,17 0,17">
          <text:p/>
        </draw:polygon>
        <draw:polygon draw:style-name="gr5" draw:text-style-name="P6" draw:layer="layout" svg:width="6.985cm" svg:height="0.016cm" svg:x="3.798cm" svg:y="6.139cm" svg:viewBox="0 0 6986 17" draw:points="0,0 6986,0 6986,17 0,17">
          <text:p/>
        </draw:polygon>
        <draw:polygon draw:style-name="gr5" draw:text-style-name="P6" draw:layer="layout" svg:width="0.016cm" svg:height="1.008cm" svg:x="10.784cm" svg:y="5.131cm" svg:viewBox="0 0 17 1009" draw:points="0,0 17,0 17,1009 0,1009">
          <text:p/>
        </draw:polygon>
        <draw:polygon draw:style-name="gr5" draw:text-style-name="P6" draw:layer="layout" svg:width="0.016cm" svg:height="0.016cm" svg:x="10.784cm" svg:y="6.139cm" svg:viewBox="0 0 17 17" draw:points="0,0 17,0 17,17 0,17">
          <text:p/>
        </draw:polygon>
        <draw:polygon draw:style-name="gr5" draw:text-style-name="P6" draw:layer="layout" svg:width="5.988cm" svg:height="0.016cm" svg:x="10.8cm" svg:y="6.139cm" svg:viewBox="0 0 5989 17" draw:points="0,0 5989,0 5989,17 0,17">
          <text:p/>
        </draw:polygon>
        <draw:polygon draw:style-name="gr5" draw:text-style-name="P6" draw:layer="layout" svg:width="0.017cm" svg:height="1.008cm" svg:x="16.788cm" svg:y="5.131cm" svg:viewBox="0 0 18 1009" draw:points="0,0 18,0 18,1009 0,1009">
          <text:p/>
        </draw:polygon>
        <draw:polygon draw:style-name="gr5" draw:text-style-name="P6" draw:layer="layout" svg:width="0.017cm" svg:height="0.016cm" svg:x="16.788cm" svg:y="6.139cm" svg:viewBox="0 0 18 17" draw:points="0,0 18,0 18,17 0,17">
          <text:p/>
        </draw:polygon>
        <draw:polygon draw:style-name="gr5" draw:text-style-name="P6" draw:layer="layout" svg:width="2.43cm" svg:height="0.016cm" svg:x="16.805cm" svg:y="6.139cm" svg:viewBox="0 0 2431 17" draw:points="0,0 2431,0 2431,17 0,17">
          <text:p/>
        </draw:polygon>
        <draw:polygon draw:style-name="gr5" draw:text-style-name="P6" draw:layer="layout" svg:width="0.017cm" svg:height="1.008cm" svg:x="19.235cm" svg:y="5.131cm" svg:viewBox="0 0 18 1009" draw:points="0,0 18,0 18,1009 0,1009">
          <text:p/>
        </draw:polygon>
        <draw:polygon draw:style-name="gr5" draw:text-style-name="P6" draw:layer="layout" svg:width="0.017cm" svg:height="0.016cm" svg:x="19.235cm" svg:y="6.139cm" svg:viewBox="0 0 18 17" draw:points="0,0 18,0 18,17 0,17">
          <text:p/>
        </draw:polygon>
        <draw:polygon draw:style-name="gr5" draw:text-style-name="P6" draw:layer="layout" svg:width="0.017cm" svg:height="0.016cm" svg:x="19.235cm" svg:y="6.139cm" svg:viewBox="0 0 18 17" draw:points="0,0 18,0 18,17 0,17">
          <text:p/>
        </draw:polygon>
        <draw:frame draw:style-name="gr4" draw:text-style-name="P5" draw:layer="layout" svg:width="0.35cm" svg:height="0.39cm" svg:x="16.988cm" svg:y="5.14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6.417cm" svg:height="0.39cm" svg:x="2.541cm" svg:y="6.596cm">
          <draw:text-box>
            <text:p text:style-name="P1"><text:span text:style-name="T9">Name of the Verifying Admissions Officer:…………………………………………………………………………… </text:span></text:p>
          </draw:text-box>
        </draw:frame>
        <draw:frame draw:style-name="gr4" draw:text-style-name="P5" draw:layer="layout" svg:width="6.102cm" svg:height="0.39cm" svg:x="2.541cm" svg:y="7.485cm">
          <draw:text-box>
            <text:p text:style-name="P1"><text:span text:style-name="T9">Signature:………………………………… </text:span></text:p>
          </draw:text-box>
        </draw:frame>
        <draw:frame draw:style-name="gr4" draw:text-style-name="P5" draw:layer="layout" svg:width="5.76cm" svg:height="0.39cm" svg:x="8.892cm" svg:y="7.485cm">
          <draw:text-box>
            <text:p text:style-name="P1"><text:span text:style-name="T9">Date…………………………………… <text:s/></text:span></text:p>
          </draw:text-box>
        </draw:frame>
        <draw:frame draw:style-name="gr4" draw:text-style-name="P5" draw:layer="layout" svg:width="3.623cm" svg:height="0.39cm" svg:x="15.242cm" svg:y="7.485cm">
          <draw:text-box>
            <text:p text:style-name="P1"><text:span text:style-name="T9">Stamp………………….. </text:span></text:p>
          </draw:text-box>
        </draw:frame>
        <draw:frame draw:style-name="gr4" draw:text-style-name="P5" draw:layer="layout" svg:width="0.35cm" svg:height="0.39cm" svg:x="2.541cm" svg:y="7.95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cm" svg:height="0.39cm" svg:x="3.811cm" svg:y="7.95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6.271cm" svg:height="0.39cm" svg:x="2.541cm" svg:y="8.845cm">
          <draw:text-box>
            <text:p text:style-name="P1"><text:span text:style-name="T6">Note: </text:span><text:span text:style-name="T5">This Form must be retained by the Admissions Officer v</text:span><text:span text:style-name="T8">erifying the Student’s Documents </text:span><text:span text:style-name="T5">on behalf of </text:span></text:p>
          </draw:text-box>
        </draw:frame>
        <draw:frame draw:style-name="gr4" draw:text-style-name="P5" draw:layer="layout" svg:width="6.812cm" svg:height="0.39cm" svg:x="2.541cm" svg:y="9.307cm">
          <draw:text-box>
            <text:p text:style-name="P1"><text:span text:style-name="T5">the Registrar, Academic Affairs &amp; Research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Black" svg:font-family="'Arial Black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25T22:45:28.784104808</dc:date>
    <meta:editing-duration>PT10M38S</meta:editing-duration>
    <meta:editing-cycles>1</meta:editing-cycles>
    <meta:document-statistic meta:object-count="311"/>
    <meta:generator>LibreOffice/26.2.4.2$Linux_X86_64 LibreOffice_project/620$Build-2</meta:generator>
  </office:meta>
</office:document-meta>
</file>